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14.09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3.133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0.587cm"/>
    </style:style>
    <style:style style:name="co16" style:family="table-column">
      <style:table-column-properties fo:break-before="auto" style:column-width="22.516cm"/>
    </style:style>
    <style:style style:name="co17" style:family="table-column">
      <style:table-column-properties fo:break-before="auto" style:column-width="15.66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2.805cm" fo:break-before="auto" style:use-optimal-row-height="false"/>
    </style:style>
    <style:style style:name="ta1" style:family="table" style:master-page-name="PageStyle_5f_ISTRUZIONI">
      <style:table-properties table:display="true" style:writing-mode="lr-tb" table:tab-color="#0b1628"/>
    </style:style>
    <style:style style:name="ta2" style:family="table" style:master-page-name="PageStyle_5f_PARTITE">
      <style:table-properties table:display="true" style:writing-mode="lr-tb" table:tab-color="#c9a84c"/>
    </style:style>
    <style:style style:name="ta3" style:family="table" style:master-page-name="PageStyle_5f_GIOCATORI">
      <style:table-properties table:display="true" style:writing-mode="lr-tb" table:tab-color="#2196f3"/>
    </style:style>
    <style:style style:name="ta4" style:family="table" style:master-page-name="PageStyle_5f__5f_CALC">
      <style:table-properties table:display="false" style:writing-mode="lr-tb"/>
    </style:style>
    <style:style style:name="ta5" style:family="table" style:master-page-name="PageStyle_5f_CLASSIFICA">
      <style:table-properties table:display="true" style:writing-mode="lr-tb" table:tab-color="#4caf50"/>
    </style:style>
    <style:style style:name="ta6" style:family="table" style:master-page-name="PageStyle_5f_EXPORT_5f_JSON">
      <style:table-properties table:display="true" style:writing-mode="lr-tb" table:tab-color="#ff5722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b162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a84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0b162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5edd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b162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b162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8c96a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f3e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0392b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0b162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c9a84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162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1e3050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f1e35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0f1e35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de7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392b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36">
      <style:table-cell-properties fo:background-color="#f5f5f5" style:diagonal-bl-tr="none" style:diagonal-tl-br="none" fo:border="0.74pt solid #444444" style:rotation-align="none"/>
    </style:style>
    <style:style style:name="ce15" style:family="table-cell" style:parent-style-name="Default">
      <style:table-cell-properties fo:background-color="#f5f5f5" style:diagonal-bl-tr="none" style:diagonal-tl-br="none" fo:border="0.74pt solid #444444" style:rotation-align="none"/>
    </style:style>
    <style:style style:name="ce16" style:family="table-cell" style:parent-style-name="Default">
      <style:table-cell-properties fo:background-color="#f5f5f5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0b162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88888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0f1e35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88888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de7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c9a84c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162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0b162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c9a84c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b162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13203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0b1628" style:diagonal-bl-tr="none" style:diagonal-tl-br="none" style:text-align-source="fix" style:repeat-content="false" fo:wrap-option="wrap" fo:border="0.74pt solid #44444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a84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13203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5edd8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132038" style:rotation-align="none"/>
      <style:text-properties fo:color="#e8c96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de7" style:diagonal-bl-tr="none" style:diagonal-tl-br="none" style:text-align-source="fix" style:repeat-content="false" fo:wrap-option="wrap" fo:border="1.76pt solid #c9a84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888888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rino 1&quot;;&quot;Torino 2&quot;;&quot;Mestre 1&quot;;&quot;Venezia/Mestre&quot;;&quot;Merano&quot;;&quot;Pordenone&quot;;&quot;San Giorgio di Nogaro&quot;;&quot;Udine&quot;;&quot;Trieste 1&quot;;&quot;Trieste 2&quot;)" table:allow-empty-cell="true" table:display-list="unsorted" table:base-cell-address="EXPORT_JSON.D3">
          <table:error-message table:message-type="stop" table:display="true"/>
        </table:content-validation>
        <table:content-validation table:name="val2" table:condition="of:cell-content-is-in-list(&quot;Portiere&quot;;&quot;Difensore&quot;;&quot;Centrocampista&quot;;&quot;Attaccante&quot;)" table:allow-empty-cell="true" table:display-list="unsorted" table:base-cell-address="EXPORT_JSON.I3"/>
      </table:content-validation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6382"/>
        <table:table-row table:style-name="ro1">
          <table:table-cell/>
          <table:table-cell table:style-name="ce1" office:value-type="string" calcext:value-type="string">
            <text:p>KAIROS CUP 2025 — Gestione Torneo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Campo Giarizzole · Trieste · Calcio a 7 · 10 squadre</text:p>
          </table:table-cell>
          <table:table-cell table:style-name="Default" table:number-columns-repeated="16382"/>
        </table:table-row>
        <table:table-row table:style-name="ro2">
          <table:table-cell/>
          <table:table-cell table:style-name="ce3"/>
          <table:table-cell table:style-name="Default" table:number-columns-repeated="16382"/>
        </table:table-row>
        <table:table-row table:style-name="ro2">
          <table:table-cell/>
          <table:table-cell table:style-name="ce4" office:value-type="string" calcext:value-type="string">
            <text:p>COME USARE QUESTO FILE: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1. Foglio PARTITE <text:s/>→ <text:s/>inserisci i gol (celle gialle) per ogni partita giocata.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2. Foglio GIOCATORI <text:s/>→ <text:s/>inserisci nome, squadra, gol, assist, voto, presenze.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3. Foglio CLASSIFICA <text:s/>→ <text:s/>si aggiorna automaticamente (non modificare le formule).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4. Foglio EXPORT_JSON <text:s/>→ <text:s/>copia il testo dalla cella B4 e incollalo nel sito.</text:p>
          </table:table-cell>
          <table:table-cell table:style-name="Default" table:number-columns-repeated="16382"/>
        </table:table-row>
        <table:table-row table:style-name="ro2">
          <table:table-cell/>
          <table:table-cell table:style-name="ce3"/>
          <table:table-cell table:style-name="Default" table:number-columns-repeated="16382"/>
        </table:table-row>
        <table:table-row table:style-name="ro2">
          <table:table-cell/>
          <table:table-cell table:style-name="ce4" office:value-type="string" calcext:value-type="string">
            <text:p>FORMATO TORNEO: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Fase 1 — Campionato avulso: tutti contro tutti (45 partite totali, 9 giornate da 5).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Fase 2 — Finali per posizione: 1°vs2°, 3°vs4°, 5°vs6°, 7°vs8°, 9°vs10°.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Punti: Vittoria=3 | Pareggio=1 | Sconfitta=0</text:p>
          </table:table-cell>
          <table:table-cell table:style-name="Default" table:number-columns-repeated="16382"/>
        </table:table-row>
        <table:table-row table:style-name="ro2">
          <table:table-cell/>
          <table:table-cell table:style-name="ce3"/>
          <table:table-cell table:style-name="Default" table:number-columns-repeated="16382"/>
        </table:table-row>
        <table:table-row table:style-name="ro2">
          <table:table-cell/>
          <table:table-cell table:style-name="ce5" office:value-type="string" calcext:value-type="string">
            <text:p>⚠ <text:s/>Non modificare le formule nei fogli CLASSIFICA e EXPORT_JSON.</text:p>
          </table:table-cell>
          <table:table-cell table:style-name="Default" table:number-columns-repeated="16382"/>
        </table:table-row>
      </table:table>
      <table:table table:name="PARTITE" table:style-name="ta2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3"/>
        <table:table-column table:style-name="co4" table:default-cell-style-name="ce9"/>
        <table:table-column table:style-name="co7" table:default-cell-style-name="ce13"/>
        <table:table-column table:style-name="co6" table:default-cell-style-name="ce11"/>
        <table:table-column table:style-name="co8" table:default-cell-style-name="ce15"/>
        <table:table-column table:style-name="co9" table:default-cell-style-name="ce15"/>
        <table:table-column table:style-name="co3" table:number-columns-repeated="16375"/>
        <table:table-row table:style-name="ro4">
          <table:table-cell table:style-name="ce6" office:value-type="string" calcext:value-type="string" table:number-columns-spanned="9" table:number-rows-spanned="1">
            <text:p>KAIROS CUP 2025 — RISULTATI PARTITE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5">
          <table:table-cell table:style-name="ce7" office:value-type="string" calcext:value-type="string" table:number-columns-spanned="9" table:number-rows-spanned="1">
            <text:p>◆ <text:s/>FASE 1 — CAMPIONATO AVULSO <text:s/>◆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Giornata</text:p>
          </table:table-cell>
          <table:table-cell table:style-name="ce8" office:value-type="string" calcext:value-type="string">
            <text:p>Squadra A</text:p>
          </table:table-cell>
          <table:table-cell table:style-name="ce8" office:value-type="string" calcext:value-type="string">
            <text:p>Gol A</text:p>
          </table:table-cell>
          <table:table-cell table:style-name="ce8" office:value-type="string" calcext:value-type="string">
            <text:p>VS</text:p>
          </table:table-cell>
          <table:table-cell table:style-name="ce8" office:value-type="string" calcext:value-type="string">
            <text:p>Gol B</text:p>
          </table:table-cell>
          <table:table-cell table:style-name="ce8" office:value-type="string" calcext:value-type="string">
            <text:p>Squadra B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orino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ino 2</text:p>
          </table:table-cell>
          <table:table-cell table:style-name="ce14" office:value-type="date" office:date-value="2026-04-21" calcext:value-type="date">
            <text:p>21/04/2026</text:p>
          </table:table-cell>
          <table:table-cell office:value-type="string" calcext:value-type="string">
            <text:p>sium</text:p>
          </table:table-cell>
          <table:table-cell table:style-name="Default" table:number-columns-repeated="16375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1</text:p>
          </table:table-cell>
          <table:table-cell table:style-name="ce12" office:value-type="string" calcext:value-type="string">
            <text:p>Mestre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enezia/Mestre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Udi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1</text:p>
          </table:table-cell>
          <table:table-cell table:style-name="ce12" office:value-type="string" calcext:value-type="string">
            <text:p>Merano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San Giorgio di Nogar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ordenone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Pordeno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2</text:p>
          </table:table-cell>
          <table:table-cell table:style-name="ce12" office:value-type="string" calcext:value-type="string">
            <text:p>Torino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Torino 2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Udi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2</text:p>
          </table:table-cell>
          <table:table-cell table:style-name="ce12" office:value-type="string" calcext:value-type="string">
            <text:p>Mestre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San Giorgio di Nogar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enezia/Mestre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Pordeno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G2</text:p>
          </table:table-cell>
          <table:table-cell table:style-name="ce12" office:value-type="string" calcext:value-type="string">
            <text:p>Merano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ran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Torino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iest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3</text:p>
          </table:table-cell>
          <table:table-cell table:style-name="ce12" office:value-type="string" calcext:value-type="string">
            <text:p>Trieste 2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San Giorgio di Nogar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Torino 2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Pordeno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3</text:p>
          </table:table-cell>
          <table:table-cell table:style-name="ce12" office:value-type="string" calcext:value-type="string">
            <text:p>Mestre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ran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enezia/Mestre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Venezia/Mestr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G4</text:p>
          </table:table-cell>
          <table:table-cell table:style-name="ce12" office:value-type="string" calcext:value-type="string">
            <text:p>Torino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Udi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Trieste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Pordeno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G4</text:p>
          </table:table-cell>
          <table:table-cell table:style-name="ce12" office:value-type="string" calcext:value-type="string">
            <text:p>Trieste 2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ran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Torino 2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Venezia/Mestr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4</text:p>
          </table:table-cell>
          <table:table-cell table:style-name="ce12" office:value-type="string" calcext:value-type="string">
            <text:p>Mestre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str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Torino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San Giorgio di Nogar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G5</text:p>
          </table:table-cell>
          <table:table-cell table:style-name="ce12" office:value-type="string" calcext:value-type="string">
            <text:p>Udi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ran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Trieste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Venezia/Mestr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G5</text:p>
          </table:table-cell>
          <table:table-cell table:style-name="ce12" office:value-type="string" calcext:value-type="string">
            <text:p>Trieste 2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str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Torino 2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orino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6</text:p>
          </table:table-cell>
          <table:table-cell table:style-name="ce12" office:value-type="string" calcext:value-type="string">
            <text:p>Torino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Pordeno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an Giorgio di Nogar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Venezia/Mestr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G6</text:p>
          </table:table-cell>
          <table:table-cell table:style-name="ce12" office:value-type="string" calcext:value-type="string">
            <text:p>Udi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str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Trieste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orino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G6</text:p>
          </table:table-cell>
          <table:table-cell table:style-name="ce12" office:value-type="string" calcext:value-type="string">
            <text:p>Trieste 2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Torino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Merano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G7</text:p>
          </table:table-cell>
          <table:table-cell table:style-name="ce12" office:value-type="string" calcext:value-type="string">
            <text:p>Pordeno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Mestr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San Giorgio di Nogar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orino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G7</text:p>
          </table:table-cell>
          <table:table-cell table:style-name="ce12" office:value-type="string" calcext:value-type="string">
            <text:p>Udi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Trieste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iest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G8</text:p>
          </table:table-cell>
          <table:table-cell table:style-name="ce12" office:value-type="string" calcext:value-type="string">
            <text:p>Torino 1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Venezia/Mestr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Meran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orino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G8</text:p>
          </table:table-cell>
          <table:table-cell table:style-name="ce12" office:value-type="string" calcext:value-type="string">
            <text:p>Pordeno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San Giorgio di Nogar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iest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G8</text:p>
          </table:table-cell>
          <table:table-cell table:style-name="ce12" office:value-type="string" calcext:value-type="string">
            <text:p>Udi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Udi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Torino 1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Mestr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G9</text:p>
          </table:table-cell>
          <table:table-cell table:style-name="ce12" office:value-type="string" calcext:value-type="string">
            <text:p>Venezia/Mestr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Trieste 2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Meran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ieste 1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G9</text:p>
          </table:table-cell>
          <table:table-cell table:style-name="ce12" office:value-type="string" calcext:value-type="string">
            <text:p>Pordenone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2" office:value-type="string" calcext:value-type="string">
            <text:p>Udine</text:p>
          </table:table-cell>
          <table:table-cell table:number-columns-repeated="2"/>
          <table:table-cell table:style-name="Default" table:number-columns-repeated="16375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San Giorgio di Nogaro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San Giorgio di Nogaro</text:p>
          </table:table-cell>
          <table:table-cell table:number-columns-repeated="2"/>
          <table:table-cell table:style-name="Default" table:number-columns-repeated="16375"/>
        </table:table-row>
        <table:table-row table:style-name="ro5">
          <table:table-cell table:style-name="ce7" office:value-type="string" calcext:value-type="string" table:number-columns-spanned="9" table:number-rows-spanned="1">
            <text:p>◆ <text:s/>FASE 2 — FINALI PER POSIZIONE <text:s/>◆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Giornata</text:p>
          </table:table-cell>
          <table:table-cell table:style-name="ce8" office:value-type="string" calcext:value-type="string">
            <text:p>Squadra A</text:p>
          </table:table-cell>
          <table:table-cell table:style-name="ce8" office:value-type="string" calcext:value-type="string">
            <text:p>Gol A</text:p>
          </table:table-cell>
          <table:table-cell table:style-name="ce8" office:value-type="string" calcext:value-type="string">
            <text:p>VS</text:p>
          </table:table-cell>
          <table:table-cell table:style-name="ce8" office:value-type="string" calcext:value-type="string">
            <text:p>Gol B</text:p>
          </table:table-cell>
          <table:table-cell table:style-name="ce8" office:value-type="string" calcext:value-type="string">
            <text:p>Squadra B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TBD (dalla classifica)</text:p>
          </table:table-cell>
          <table:table-cell/>
          <table:table-cell office:value-type="string" calcext:value-type="string">
            <text:p>VS</text:p>
          </table:table-cell>
          <table:table-cell/>
          <table:table-cell table:style-name="ce9" office:value-type="string" calcext:value-type="string">
            <text:p>TBD (dalla classifica)</text:p>
          </table:table-cell>
          <table:table-cell table:style-name="ce16" office:value-type="string" calcext:value-type="string">
            <text:p>Finale 1°/2°</text:p>
          </table:table-cell>
          <table:table-cell/>
          <table:table-cell table:style-name="Default" table:number-columns-repeated="16375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BD (dalla classifica)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0" office:value-type="string" calcext:value-type="string">
            <text:p>TBD (dalla classifica)</text:p>
          </table:table-cell>
          <table:table-cell table:style-name="ce16" office:value-type="string" calcext:value-type="string">
            <text:p>Finale 3°/4°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TBD (dalla classifica)</text:p>
          </table:table-cell>
          <table:table-cell/>
          <table:table-cell office:value-type="string" calcext:value-type="string">
            <text:p>VS</text:p>
          </table:table-cell>
          <table:table-cell/>
          <table:table-cell table:style-name="ce9" office:value-type="string" calcext:value-type="string">
            <text:p>TBD (dalla classifica)</text:p>
          </table:table-cell>
          <table:table-cell table:style-name="ce16" office:value-type="string" calcext:value-type="string">
            <text:p>Finale 5°/6°</text:p>
          </table:table-cell>
          <table:table-cell/>
          <table:table-cell table:style-name="Default" table:number-columns-repeated="16375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BD (dalla classifica)</text:p>
          </table:table-cell>
          <table:table-cell/>
          <table:table-cell table:style-name="ce10" office:value-type="string" calcext:value-type="string">
            <text:p>VS</text:p>
          </table:table-cell>
          <table:table-cell/>
          <table:table-cell table:style-name="ce10" office:value-type="string" calcext:value-type="string">
            <text:p>TBD (dalla classifica)</text:p>
          </table:table-cell>
          <table:table-cell table:style-name="ce16" office:value-type="string" calcext:value-type="string">
            <text:p>Finale 7°/8°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TBD (dalla classifica)</text:p>
          </table:table-cell>
          <table:table-cell/>
          <table:table-cell office:value-type="string" calcext:value-type="string">
            <text:p>VS</text:p>
          </table:table-cell>
          <table:table-cell/>
          <table:table-cell table:style-name="ce9" office:value-type="string" calcext:value-type="string">
            <text:p>TBD (dalla classifica)</text:p>
          </table:table-cell>
          <table:table-cell table:style-name="ce16" office:value-type="string" calcext:value-type="string">
            <text:p>Finale 9°/10°</text:p>
          </table:table-cell>
          <table:table-cell/>
          <table:table-cell table:style-name="Default" table:number-columns-repeated="16375"/>
        </table:table-row>
      </table:table>
      <table:table table:name="GIOCATORI" table:style-name="ta3">
        <office:forms form:automatic-focus="false" form:apply-design-mode="false"/>
        <table:table-column table:style-name="co4" table:default-cell-style-name="ce17"/>
        <table:table-column table:style-name="co4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number-columns-repeated="3" table:default-cell-style-name="ce19"/>
        <table:table-column table:style-name="co12" table:default-cell-style-name="ce19"/>
        <table:table-column table:style-name="co13" table:default-cell-style-name="ce19"/>
        <table:table-column table:style-name="co3" table:number-columns-repeated="16375"/>
        <table:table-row table:style-name="ro4">
          <table:table-cell table:style-name="ce6" office:value-type="string" calcext:value-type="string" table:number-columns-spanned="9" table:number-rows-spanned="1">
            <text:p>KAIROS CUP 2025 — DATI GIOCATORI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°</text:p>
          </table:table-cell>
          <table:table-cell table:style-name="ce8" office:value-type="string" calcext:value-type="string">
            <text:p>Cognome e Nome</text:p>
          </table:table-cell>
          <table:table-cell table:style-name="ce8" office:value-type="string" calcext:value-type="string">
            <text:p>Squadra</text:p>
          </table:table-cell>
          <table:table-cell table:style-name="ce8" office:value-type="string" calcext:value-type="string">
            <text:p>Gol</text:p>
          </table:table-cell>
          <table:table-cell table:style-name="ce8" office:value-type="string" calcext:value-type="string">
            <text:p>Assist</text:p>
          </table:table-cell>
          <table:table-cell table:style-name="ce8" office:value-type="string" calcext:value-type="string">
            <text:p>Voto (1-10)</text:p>
          </table:table-cell>
          <table:table-cell table:style-name="ce8" office:value-type="string" calcext:value-type="string">
            <text:p>Presenze</text:p>
          </table:table-cell>
          <table:table-cell table:style-name="ce8" office:value-type="string" calcext:value-type="string">
            <text:p>Ruolo</text:p>
          </table:table-cell>
          <table:table-cell table:style-name="Default" table:number-columns-repeated="1637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ento Simone</text:p>
          </table:table-cell>
          <table:table-cell table:content-validation-name="val1" office:value-type="string" calcext:value-type="string">
            <text:p>Torino 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cante</text:p>
          </table:table-cell>
          <table:table-cell table:style-name="Default" table:number-columns-repeated="16375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" calcext:value-type="float">
            <text:p>1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" calcext:value-type="float">
            <text:p>1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" calcext:value-type="float">
            <text:p>1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" calcext:value-type="float">
            <text:p>1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0" calcext:value-type="float">
            <text:p>2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2" calcext:value-type="float">
            <text:p>2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4" calcext:value-type="float">
            <text:p>2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6" calcext:value-type="float">
            <text:p>2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8" calcext:value-type="float">
            <text:p>2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30" calcext:value-type="float">
            <text:p>3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32" calcext:value-type="float">
            <text:p>3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34" calcext:value-type="float">
            <text:p>3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36" calcext:value-type="float">
            <text:p>3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38" calcext:value-type="float">
            <text:p>3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0" calcext:value-type="float">
            <text:p>4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41" calcext:value-type="float">
            <text:p>4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2" calcext:value-type="float">
            <text:p>4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43" calcext:value-type="float">
            <text:p>4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4" calcext:value-type="float">
            <text:p>4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6" calcext:value-type="float">
            <text:p>4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47" calcext:value-type="float">
            <text:p>4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48" calcext:value-type="float">
            <text:p>4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49" calcext:value-type="float">
            <text:p>4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52" calcext:value-type="float">
            <text:p>5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3" calcext:value-type="float">
            <text:p>5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54" calcext:value-type="float">
            <text:p>5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5" calcext:value-type="float">
            <text:p>5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56" calcext:value-type="float">
            <text:p>5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7" calcext:value-type="float">
            <text:p>5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58" calcext:value-type="float">
            <text:p>5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0" calcext:value-type="float">
            <text:p>6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61" calcext:value-type="float">
            <text:p>6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2" calcext:value-type="float">
            <text:p>6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63" calcext:value-type="float">
            <text:p>6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4" calcext:value-type="float">
            <text:p>6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65" calcext:value-type="float">
            <text:p>6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6" calcext:value-type="float">
            <text:p>6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68" calcext:value-type="float">
            <text:p>6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69" calcext:value-type="float">
            <text:p>6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70" calcext:value-type="float">
            <text:p>7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1" calcext:value-type="float">
            <text:p>7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72" calcext:value-type="float">
            <text:p>7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3" calcext:value-type="float">
            <text:p>7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74" calcext:value-type="float">
            <text:p>7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5" calcext:value-type="float">
            <text:p>7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76" calcext:value-type="float">
            <text:p>7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7" calcext:value-type="float">
            <text:p>7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78" calcext:value-type="float">
            <text:p>7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79" calcext:value-type="float">
            <text:p>7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0" calcext:value-type="float">
            <text:p>8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81" calcext:value-type="float">
            <text:p>8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2" calcext:value-type="float">
            <text:p>8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83" calcext:value-type="float">
            <text:p>8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4" calcext:value-type="float">
            <text:p>8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85" calcext:value-type="float">
            <text:p>8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6" calcext:value-type="float">
            <text:p>8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87" calcext:value-type="float">
            <text:p>8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88" calcext:value-type="float">
            <text:p>8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89" calcext:value-type="float">
            <text:p>8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90" calcext:value-type="float">
            <text:p>9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1" calcext:value-type="float">
            <text:p>9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92" calcext:value-type="float">
            <text:p>9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3" calcext:value-type="float">
            <text:p>9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94" calcext:value-type="float">
            <text:p>9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5" calcext:value-type="float">
            <text:p>9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96" calcext:value-type="float">
            <text:p>9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7" calcext:value-type="float">
            <text:p>9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98" calcext:value-type="float">
            <text:p>9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99" calcext:value-type="float">
            <text:p>9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01" calcext:value-type="float">
            <text:p>10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2" calcext:value-type="float">
            <text:p>10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03" calcext:value-type="float">
            <text:p>10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4" calcext:value-type="float">
            <text:p>10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05" calcext:value-type="float">
            <text:p>10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6" calcext:value-type="float">
            <text:p>10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07" calcext:value-type="float">
            <text:p>10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08" calcext:value-type="float">
            <text:p>10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09" calcext:value-type="float">
            <text:p>10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10" calcext:value-type="float">
            <text:p>11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1" calcext:value-type="float">
            <text:p>11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12" calcext:value-type="float">
            <text:p>11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3" calcext:value-type="float">
            <text:p>11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14" calcext:value-type="float">
            <text:p>11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5" calcext:value-type="float">
            <text:p>11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16" calcext:value-type="float">
            <text:p>11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7" calcext:value-type="float">
            <text:p>11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18" calcext:value-type="float">
            <text:p>11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19" calcext:value-type="float">
            <text:p>11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0" calcext:value-type="float">
            <text:p>12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21" calcext:value-type="float">
            <text:p>12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2" calcext:value-type="float">
            <text:p>12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23" calcext:value-type="float">
            <text:p>12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4" calcext:value-type="float">
            <text:p>12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25" calcext:value-type="float">
            <text:p>12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6" calcext:value-type="float">
            <text:p>12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27" calcext:value-type="float">
            <text:p>12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28" calcext:value-type="float">
            <text:p>12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29" calcext:value-type="float">
            <text:p>12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30" calcext:value-type="float">
            <text:p>13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1" calcext:value-type="float">
            <text:p>13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32" calcext:value-type="float">
            <text:p>13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3" calcext:value-type="float">
            <text:p>13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34" calcext:value-type="float">
            <text:p>13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5" calcext:value-type="float">
            <text:p>13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36" calcext:value-type="float">
            <text:p>13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7" calcext:value-type="float">
            <text:p>13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38" calcext:value-type="float">
            <text:p>13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39" calcext:value-type="float">
            <text:p>13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0" calcext:value-type="float">
            <text:p>14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41" calcext:value-type="float">
            <text:p>14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2" calcext:value-type="float">
            <text:p>14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43" calcext:value-type="float">
            <text:p>14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4" calcext:value-type="float">
            <text:p>14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45" calcext:value-type="float">
            <text:p>14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6" calcext:value-type="float">
            <text:p>14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47" calcext:value-type="float">
            <text:p>14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48" calcext:value-type="float">
            <text:p>14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49" calcext:value-type="float">
            <text:p>14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50" calcext:value-type="float">
            <text:p>15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1" calcext:value-type="float">
            <text:p>15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52" calcext:value-type="float">
            <text:p>15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3" calcext:value-type="float">
            <text:p>15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54" calcext:value-type="float">
            <text:p>15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5" calcext:value-type="float">
            <text:p>15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56" calcext:value-type="float">
            <text:p>15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7" calcext:value-type="float">
            <text:p>15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58" calcext:value-type="float">
            <text:p>15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59" calcext:value-type="float">
            <text:p>15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0" calcext:value-type="float">
            <text:p>16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61" calcext:value-type="float">
            <text:p>16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2" calcext:value-type="float">
            <text:p>16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63" calcext:value-type="float">
            <text:p>16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4" calcext:value-type="float">
            <text:p>16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65" calcext:value-type="float">
            <text:p>16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6" calcext:value-type="float">
            <text:p>16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67" calcext:value-type="float">
            <text:p>16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68" calcext:value-type="float">
            <text:p>16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69" calcext:value-type="float">
            <text:p>16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70" calcext:value-type="float">
            <text:p>17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1" calcext:value-type="float">
            <text:p>17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72" calcext:value-type="float">
            <text:p>17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3" calcext:value-type="float">
            <text:p>17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74" calcext:value-type="float">
            <text:p>17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5" calcext:value-type="float">
            <text:p>17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7" calcext:value-type="float">
            <text:p>17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78" calcext:value-type="float">
            <text:p>17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79" calcext:value-type="float">
            <text:p>17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0" calcext:value-type="float">
            <text:p>18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81" calcext:value-type="float">
            <text:p>18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2" calcext:value-type="float">
            <text:p>18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83" calcext:value-type="float">
            <text:p>18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4" calcext:value-type="float">
            <text:p>18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85" calcext:value-type="float">
            <text:p>18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6" calcext:value-type="float">
            <text:p>18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87" calcext:value-type="float">
            <text:p>18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88" calcext:value-type="float">
            <text:p>18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89" calcext:value-type="float">
            <text:p>18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90" calcext:value-type="float">
            <text:p>19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1" calcext:value-type="float">
            <text:p>191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3" calcext:value-type="float">
            <text:p>193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94" calcext:value-type="float">
            <text:p>194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5" calcext:value-type="float">
            <text:p>195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96" calcext:value-type="float">
            <text:p>196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7" calcext:value-type="float">
            <text:p>197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198" calcext:value-type="float">
            <text:p>198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office:value-type="float" office:value="199" calcext:value-type="float">
            <text:p>199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  <table:table-row table:style-name="ro7"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style-name="Default" table:number-columns-repeated="16375"/>
        </table:table-row>
      </table:table>
      <table:table table:name="_CALC" table:style-name="ta4">
        <table:table-column table:style-name="co3" table:number-columns-repeated="9" table:default-cell-style-name="Default"/>
        <table:table-column table:style-name="co3" table:number-columns-repeated="16375"/>
        <table:table-row table:style-name="ro3">
          <table:table-cell office:value-type="string" calcext:value-type="string">
            <text:p>Squad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nk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Torino 1</text:p>
          </table:table-cell>
          <table:table-cell table:formula="of:=COUNTIFS([$PARTITE.C4:.C48];[.A2];[$PARTITE.D4:.D48];&quot;&gt;=&quot;&amp;0;[$PARTITE.F4:.F48];&quot;&gt;=&quot;&amp;0)+COUNTIFS([$PARTITE.G4:.G48];[.A2];[$PARTITE.D4:.D48];&quot;&gt;=&quot;&amp;0;[$PARTITE.F4:.F48];&quot;&gt;=&quot;&amp;0)" office:value-type="float" office:value="1" calcext:value-type="float">
            <text:p>1</text:p>
          </table:table-cell>
          <table:table-cell table:formula="of:=SUMPRODUCT(([$PARTITE.C4:.C48]=[.A2])*(ISNUMBER([$PARTITE.D4:.D48]))*(ISNUMBER([$PARTITE.F4:.F48]))*([$PARTITE.D4:.D48]&gt;[$PARTITE.F4:.F48]))+SUMPRODUCT(([$PARTITE.G4:.G48]=[.A2])*(ISNUMBER([$PARTITE.D4:.D48]))*(ISNUMBER([$PARTITE.F4:.F48]))*([$PARTITE.F4:.F48]&gt;[$PARTITE.D4:.D48]))" office:value-type="float" office:value="1" calcext:value-type="float">
            <text:p>1</text:p>
          </table:table-cell>
          <table:table-cell table:formula="of:=SUMPRODUCT(([$PARTITE.C4:.C48]=[.A2])*(ISNUMBER([$PARTITE.D4:.D48]))*(ISNUMBER([$PARTITE.F4:.F48]))*([$PARTITE.D4:.D48]=[$PARTITE.F4:.F48]))+SUMPRODUCT(([$PARTITE.G4:.G48]=[.A2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2]-[.C2]-[.D2]" office:value-type="float" office:value="0" calcext:value-type="float">
            <text:p>0</text:p>
          </table:table-cell>
          <table:table-cell table:formula="of:=SUMIFS([$PARTITE.D4:.D48];[$PARTITE.C4:.C48];[.A2])+SUMIFS([$PARTITE.F4:.F48];[$PARTITE.G4:.G48];[.A2])" office:value-type="float" office:value="21" calcext:value-type="float">
            <text:p>21</text:p>
          </table:table-cell>
          <table:table-cell table:formula="of:=SUMIFS([$PARTITE.F4:.F48];[$PARTITE.C4:.C48];[.A2])+SUMIFS([$PARTITE.D4:.D48];[$PARTITE.G4:.G48];[.A2])" office:value-type="float" office:value="7" calcext:value-type="float">
            <text:p>7</text:p>
          </table:table-cell>
          <table:table-cell table:formula="of:=[.C2]*3+[.D2]" office:value-type="float" office:value="3" calcext:value-type="float">
            <text:p>3</text:p>
          </table:table-cell>
          <table:table-cell table:formula="of:=RANK([.H2];[.H$2:.H$11];0)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Torino 2</text:p>
          </table:table-cell>
          <table:table-cell table:formula="of:=COUNTIFS([$PARTITE.C4:.C48];[.A3];[$PARTITE.D4:.D48];&quot;&gt;=&quot;&amp;0;[$PARTITE.F4:.F48];&quot;&gt;=&quot;&amp;0)+COUNTIFS([$PARTITE.G4:.G48];[.A3];[$PARTITE.D4:.D48];&quot;&gt;=&quot;&amp;0;[$PARTITE.F4:.F48];&quot;&gt;=&quot;&amp;0)" office:value-type="float" office:value="1" calcext:value-type="float">
            <text:p>1</text:p>
          </table:table-cell>
          <table:table-cell table:formula="of:=SUMPRODUCT(([$PARTITE.C4:.C48]=[.A3])*(ISNUMBER([$PARTITE.D4:.D48]))*(ISNUMBER([$PARTITE.F4:.F48]))*([$PARTITE.D4:.D48]&gt;[$PARTITE.F4:.F48]))+SUMPRODUCT(([$PARTITE.G4:.G48]=[.A3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3])*(ISNUMBER([$PARTITE.D4:.D48]))*(ISNUMBER([$PARTITE.F4:.F48]))*([$PARTITE.D4:.D48]=[$PARTITE.F4:.F48]))+SUMPRODUCT(([$PARTITE.G4:.G48]=[.A3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3]-[.C3]-[.D3]" office:value-type="float" office:value="1" calcext:value-type="float">
            <text:p>1</text:p>
          </table:table-cell>
          <table:table-cell table:formula="of:=SUMIFS([$PARTITE.D4:.D48];[$PARTITE.C4:.C48];[.A3])+SUMIFS([$PARTITE.F4:.F48];[$PARTITE.G4:.G48];[.A3])" office:value-type="float" office:value="7" calcext:value-type="float">
            <text:p>7</text:p>
          </table:table-cell>
          <table:table-cell table:formula="of:=SUMIFS([$PARTITE.F4:.F48];[$PARTITE.C4:.C48];[.A3])+SUMIFS([$PARTITE.D4:.D48];[$PARTITE.G4:.G48];[.A3])" office:value-type="float" office:value="21" calcext:value-type="float">
            <text:p>21</text:p>
          </table:table-cell>
          <table:table-cell table:formula="of:=[.C3]*3+[.D3]" office:value-type="float" office:value="0" calcext:value-type="float">
            <text:p>0</text:p>
          </table:table-cell>
          <table:table-cell table:formula="of:=RANK([.H3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Mestre 1</text:p>
          </table:table-cell>
          <table:table-cell table:formula="of:=COUNTIFS([$PARTITE.C4:.C48];[.A4];[$PARTITE.D4:.D48];&quot;&gt;=&quot;&amp;0;[$PARTITE.F4:.F48];&quot;&gt;=&quot;&amp;0)+COUNTIFS([$PARTITE.G4:.G48];[.A4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4])*(ISNUMBER([$PARTITE.D4:.D48]))*(ISNUMBER([$PARTITE.F4:.F48]))*([$PARTITE.D4:.D48]&gt;[$PARTITE.F4:.F48]))+SUMPRODUCT(([$PARTITE.G4:.G48]=[.A4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4])*(ISNUMBER([$PARTITE.D4:.D48]))*(ISNUMBER([$PARTITE.F4:.F48]))*([$PARTITE.D4:.D48]=[$PARTITE.F4:.F48]))+SUMPRODUCT(([$PARTITE.G4:.G48]=[.A4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4]-[.C4]-[.D4]" office:value-type="float" office:value="0" calcext:value-type="float">
            <text:p>0</text:p>
          </table:table-cell>
          <table:table-cell table:formula="of:=SUMIFS([$PARTITE.D4:.D48];[$PARTITE.C4:.C48];[.A4])+SUMIFS([$PARTITE.F4:.F48];[$PARTITE.G4:.G48];[.A4])" office:value-type="float" office:value="0" calcext:value-type="float">
            <text:p>0</text:p>
          </table:table-cell>
          <table:table-cell table:formula="of:=SUMIFS([$PARTITE.F4:.F48];[$PARTITE.C4:.C48];[.A4])+SUMIFS([$PARTITE.D4:.D48];[$PARTITE.G4:.G48];[.A4])" office:value-type="float" office:value="0" calcext:value-type="float">
            <text:p>0</text:p>
          </table:table-cell>
          <table:table-cell table:formula="of:=[.C4]*3+[.D4]" office:value-type="float" office:value="0" calcext:value-type="float">
            <text:p>0</text:p>
          </table:table-cell>
          <table:table-cell table:formula="of:=RANK([.H4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Venezia/Mestre</text:p>
          </table:table-cell>
          <table:table-cell table:formula="of:=COUNTIFS([$PARTITE.C4:.C48];[.A5];[$PARTITE.D4:.D48];&quot;&gt;=&quot;&amp;0;[$PARTITE.F4:.F48];&quot;&gt;=&quot;&amp;0)+COUNTIFS([$PARTITE.G4:.G48];[.A5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5])*(ISNUMBER([$PARTITE.D4:.D48]))*(ISNUMBER([$PARTITE.F4:.F48]))*([$PARTITE.D4:.D48]&gt;[$PARTITE.F4:.F48]))+SUMPRODUCT(([$PARTITE.G4:.G48]=[.A5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5])*(ISNUMBER([$PARTITE.D4:.D48]))*(ISNUMBER([$PARTITE.F4:.F48]))*([$PARTITE.D4:.D48]=[$PARTITE.F4:.F48]))+SUMPRODUCT(([$PARTITE.G4:.G48]=[.A5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5]-[.C5]-[.D5]" office:value-type="float" office:value="0" calcext:value-type="float">
            <text:p>0</text:p>
          </table:table-cell>
          <table:table-cell table:formula="of:=SUMIFS([$PARTITE.D4:.D48];[$PARTITE.C4:.C48];[.A5])+SUMIFS([$PARTITE.F4:.F48];[$PARTITE.G4:.G48];[.A5])" office:value-type="float" office:value="0" calcext:value-type="float">
            <text:p>0</text:p>
          </table:table-cell>
          <table:table-cell table:formula="of:=SUMIFS([$PARTITE.F4:.F48];[$PARTITE.C4:.C48];[.A5])+SUMIFS([$PARTITE.D4:.D48];[$PARTITE.G4:.G48];[.A5])" office:value-type="float" office:value="0" calcext:value-type="float">
            <text:p>0</text:p>
          </table:table-cell>
          <table:table-cell table:formula="of:=[.C5]*3+[.D5]" office:value-type="float" office:value="0" calcext:value-type="float">
            <text:p>0</text:p>
          </table:table-cell>
          <table:table-cell table:formula="of:=RANK([.H5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Merano</text:p>
          </table:table-cell>
          <table:table-cell table:formula="of:=COUNTIFS([$PARTITE.C4:.C48];[.A6];[$PARTITE.D4:.D48];&quot;&gt;=&quot;&amp;0;[$PARTITE.F4:.F48];&quot;&gt;=&quot;&amp;0)+COUNTIFS([$PARTITE.G4:.G48];[.A6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6])*(ISNUMBER([$PARTITE.D4:.D48]))*(ISNUMBER([$PARTITE.F4:.F48]))*([$PARTITE.D4:.D48]&gt;[$PARTITE.F4:.F48]))+SUMPRODUCT(([$PARTITE.G4:.G48]=[.A6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6])*(ISNUMBER([$PARTITE.D4:.D48]))*(ISNUMBER([$PARTITE.F4:.F48]))*([$PARTITE.D4:.D48]=[$PARTITE.F4:.F48]))+SUMPRODUCT(([$PARTITE.G4:.G48]=[.A6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6]-[.C6]-[.D6]" office:value-type="float" office:value="0" calcext:value-type="float">
            <text:p>0</text:p>
          </table:table-cell>
          <table:table-cell table:formula="of:=SUMIFS([$PARTITE.D4:.D48];[$PARTITE.C4:.C48];[.A6])+SUMIFS([$PARTITE.F4:.F48];[$PARTITE.G4:.G48];[.A6])" office:value-type="float" office:value="0" calcext:value-type="float">
            <text:p>0</text:p>
          </table:table-cell>
          <table:table-cell table:formula="of:=SUMIFS([$PARTITE.F4:.F48];[$PARTITE.C4:.C48];[.A6])+SUMIFS([$PARTITE.D4:.D48];[$PARTITE.G4:.G48];[.A6])" office:value-type="float" office:value="0" calcext:value-type="float">
            <text:p>0</text:p>
          </table:table-cell>
          <table:table-cell table:formula="of:=[.C6]*3+[.D6]" office:value-type="float" office:value="0" calcext:value-type="float">
            <text:p>0</text:p>
          </table:table-cell>
          <table:table-cell table:formula="of:=RANK([.H6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Pordenone</text:p>
          </table:table-cell>
          <table:table-cell table:formula="of:=COUNTIFS([$PARTITE.C4:.C48];[.A7];[$PARTITE.D4:.D48];&quot;&gt;=&quot;&amp;0;[$PARTITE.F4:.F48];&quot;&gt;=&quot;&amp;0)+COUNTIFS([$PARTITE.G4:.G48];[.A7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7])*(ISNUMBER([$PARTITE.D4:.D48]))*(ISNUMBER([$PARTITE.F4:.F48]))*([$PARTITE.D4:.D48]&gt;[$PARTITE.F4:.F48]))+SUMPRODUCT(([$PARTITE.G4:.G48]=[.A7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7])*(ISNUMBER([$PARTITE.D4:.D48]))*(ISNUMBER([$PARTITE.F4:.F48]))*([$PARTITE.D4:.D48]=[$PARTITE.F4:.F48]))+SUMPRODUCT(([$PARTITE.G4:.G48]=[.A7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7]-[.C7]-[.D7]" office:value-type="float" office:value="0" calcext:value-type="float">
            <text:p>0</text:p>
          </table:table-cell>
          <table:table-cell table:formula="of:=SUMIFS([$PARTITE.D4:.D48];[$PARTITE.C4:.C48];[.A7])+SUMIFS([$PARTITE.F4:.F48];[$PARTITE.G4:.G48];[.A7])" office:value-type="float" office:value="0" calcext:value-type="float">
            <text:p>0</text:p>
          </table:table-cell>
          <table:table-cell table:formula="of:=SUMIFS([$PARTITE.F4:.F48];[$PARTITE.C4:.C48];[.A7])+SUMIFS([$PARTITE.D4:.D48];[$PARTITE.G4:.G48];[.A7])" office:value-type="float" office:value="0" calcext:value-type="float">
            <text:p>0</text:p>
          </table:table-cell>
          <table:table-cell table:formula="of:=[.C7]*3+[.D7]" office:value-type="float" office:value="0" calcext:value-type="float">
            <text:p>0</text:p>
          </table:table-cell>
          <table:table-cell table:formula="of:=RANK([.H7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San Giorgio di Nogaro</text:p>
          </table:table-cell>
          <table:table-cell table:formula="of:=COUNTIFS([$PARTITE.C4:.C48];[.A8];[$PARTITE.D4:.D48];&quot;&gt;=&quot;&amp;0;[$PARTITE.F4:.F48];&quot;&gt;=&quot;&amp;0)+COUNTIFS([$PARTITE.G4:.G48];[.A8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8])*(ISNUMBER([$PARTITE.D4:.D48]))*(ISNUMBER([$PARTITE.F4:.F48]))*([$PARTITE.D4:.D48]&gt;[$PARTITE.F4:.F48]))+SUMPRODUCT(([$PARTITE.G4:.G48]=[.A8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8])*(ISNUMBER([$PARTITE.D4:.D48]))*(ISNUMBER([$PARTITE.F4:.F48]))*([$PARTITE.D4:.D48]=[$PARTITE.F4:.F48]))+SUMPRODUCT(([$PARTITE.G4:.G48]=[.A8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8]-[.C8]-[.D8]" office:value-type="float" office:value="0" calcext:value-type="float">
            <text:p>0</text:p>
          </table:table-cell>
          <table:table-cell table:formula="of:=SUMIFS([$PARTITE.D4:.D48];[$PARTITE.C4:.C48];[.A8])+SUMIFS([$PARTITE.F4:.F48];[$PARTITE.G4:.G48];[.A8])" office:value-type="float" office:value="0" calcext:value-type="float">
            <text:p>0</text:p>
          </table:table-cell>
          <table:table-cell table:formula="of:=SUMIFS([$PARTITE.F4:.F48];[$PARTITE.C4:.C48];[.A8])+SUMIFS([$PARTITE.D4:.D48];[$PARTITE.G4:.G48];[.A8])" office:value-type="float" office:value="0" calcext:value-type="float">
            <text:p>0</text:p>
          </table:table-cell>
          <table:table-cell table:formula="of:=[.C8]*3+[.D8]" office:value-type="float" office:value="0" calcext:value-type="float">
            <text:p>0</text:p>
          </table:table-cell>
          <table:table-cell table:formula="of:=RANK([.H8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Udine</text:p>
          </table:table-cell>
          <table:table-cell table:formula="of:=COUNTIFS([$PARTITE.C4:.C48];[.A9];[$PARTITE.D4:.D48];&quot;&gt;=&quot;&amp;0;[$PARTITE.F4:.F48];&quot;&gt;=&quot;&amp;0)+COUNTIFS([$PARTITE.G4:.G48];[.A9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9])*(ISNUMBER([$PARTITE.D4:.D48]))*(ISNUMBER([$PARTITE.F4:.F48]))*([$PARTITE.D4:.D48]&gt;[$PARTITE.F4:.F48]))+SUMPRODUCT(([$PARTITE.G4:.G48]=[.A9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9])*(ISNUMBER([$PARTITE.D4:.D48]))*(ISNUMBER([$PARTITE.F4:.F48]))*([$PARTITE.D4:.D48]=[$PARTITE.F4:.F48]))+SUMPRODUCT(([$PARTITE.G4:.G48]=[.A9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9]-[.C9]-[.D9]" office:value-type="float" office:value="0" calcext:value-type="float">
            <text:p>0</text:p>
          </table:table-cell>
          <table:table-cell table:formula="of:=SUMIFS([$PARTITE.D4:.D48];[$PARTITE.C4:.C48];[.A9])+SUMIFS([$PARTITE.F4:.F48];[$PARTITE.G4:.G48];[.A9])" office:value-type="float" office:value="0" calcext:value-type="float">
            <text:p>0</text:p>
          </table:table-cell>
          <table:table-cell table:formula="of:=SUMIFS([$PARTITE.F4:.F48];[$PARTITE.C4:.C48];[.A9])+SUMIFS([$PARTITE.D4:.D48];[$PARTITE.G4:.G48];[.A9])" office:value-type="float" office:value="0" calcext:value-type="float">
            <text:p>0</text:p>
          </table:table-cell>
          <table:table-cell table:formula="of:=[.C9]*3+[.D9]" office:value-type="float" office:value="0" calcext:value-type="float">
            <text:p>0</text:p>
          </table:table-cell>
          <table:table-cell table:formula="of:=RANK([.H9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Trieste 1</text:p>
          </table:table-cell>
          <table:table-cell table:formula="of:=COUNTIFS([$PARTITE.C4:.C48];[.A10];[$PARTITE.D4:.D48];&quot;&gt;=&quot;&amp;0;[$PARTITE.F4:.F48];&quot;&gt;=&quot;&amp;0)+COUNTIFS([$PARTITE.G4:.G48];[.A10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10])*(ISNUMBER([$PARTITE.D4:.D48]))*(ISNUMBER([$PARTITE.F4:.F48]))*([$PARTITE.D4:.D48]&gt;[$PARTITE.F4:.F48]))+SUMPRODUCT(([$PARTITE.G4:.G48]=[.A10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10])*(ISNUMBER([$PARTITE.D4:.D48]))*(ISNUMBER([$PARTITE.F4:.F48]))*([$PARTITE.D4:.D48]=[$PARTITE.F4:.F48]))+SUMPRODUCT(([$PARTITE.G4:.G48]=[.A10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10]-[.C10]-[.D10]" office:value-type="float" office:value="0" calcext:value-type="float">
            <text:p>0</text:p>
          </table:table-cell>
          <table:table-cell table:formula="of:=SUMIFS([$PARTITE.D4:.D48];[$PARTITE.C4:.C48];[.A10])+SUMIFS([$PARTITE.F4:.F48];[$PARTITE.G4:.G48];[.A10])" office:value-type="float" office:value="0" calcext:value-type="float">
            <text:p>0</text:p>
          </table:table-cell>
          <table:table-cell table:formula="of:=SUMIFS([$PARTITE.F4:.F48];[$PARTITE.C4:.C48];[.A10])+SUMIFS([$PARTITE.D4:.D48];[$PARTITE.G4:.G48];[.A10])" office:value-type="float" office:value="0" calcext:value-type="float">
            <text:p>0</text:p>
          </table:table-cell>
          <table:table-cell table:formula="of:=[.C10]*3+[.D10]" office:value-type="float" office:value="0" calcext:value-type="float">
            <text:p>0</text:p>
          </table:table-cell>
          <table:table-cell table:formula="of:=RANK([.H10];[.H$2:.H$11];0)" office:value-type="float" office:value="2" calcext:value-type="float">
            <text:p>2</text:p>
          </table:table-cell>
          <table:table-cell table:style-name="Default" table:number-columns-repeated="16375"/>
        </table:table-row>
        <table:table-row table:style-name="ro3">
          <table:table-cell office:value-type="string" calcext:value-type="string">
            <text:p>Trieste 2</text:p>
          </table:table-cell>
          <table:table-cell table:formula="of:=COUNTIFS([$PARTITE.C4:.C48];[.A11];[$PARTITE.D4:.D48];&quot;&gt;=&quot;&amp;0;[$PARTITE.F4:.F48];&quot;&gt;=&quot;&amp;0)+COUNTIFS([$PARTITE.G4:.G48];[.A11];[$PARTITE.D4:.D48];&quot;&gt;=&quot;&amp;0;[$PARTITE.F4:.F48];&quot;&gt;=&quot;&amp;0)" office:value-type="float" office:value="0" calcext:value-type="float">
            <text:p>0</text:p>
          </table:table-cell>
          <table:table-cell table:formula="of:=SUMPRODUCT(([$PARTITE.C4:.C48]=[.A11])*(ISNUMBER([$PARTITE.D4:.D48]))*(ISNUMBER([$PARTITE.F4:.F48]))*([$PARTITE.D4:.D48]&gt;[$PARTITE.F4:.F48]))+SUMPRODUCT(([$PARTITE.G4:.G48]=[.A11])*(ISNUMBER([$PARTITE.D4:.D48]))*(ISNUMBER([$PARTITE.F4:.F48]))*([$PARTITE.F4:.F48]&gt;[$PARTITE.D4:.D48]))" office:value-type="float" office:value="0" calcext:value-type="float">
            <text:p>0</text:p>
          </table:table-cell>
          <table:table-cell table:formula="of:=SUMPRODUCT(([$PARTITE.C4:.C48]=[.A11])*(ISNUMBER([$PARTITE.D4:.D48]))*(ISNUMBER([$PARTITE.F4:.F48]))*([$PARTITE.D4:.D48]=[$PARTITE.F4:.F48]))+SUMPRODUCT(([$PARTITE.G4:.G48]=[.A11])*(ISNUMBER([$PARTITE.D4:.D48]))*(ISNUMBER([$PARTITE.F4:.F48]))*([$PARTITE.F4:.F48]=[$PARTITE.D4:.D48]))" office:value-type="float" office:value="0" calcext:value-type="float">
            <text:p>0</text:p>
          </table:table-cell>
          <table:table-cell table:formula="of:=[.B11]-[.C11]-[.D11]" office:value-type="float" office:value="0" calcext:value-type="float">
            <text:p>0</text:p>
          </table:table-cell>
          <table:table-cell table:formula="of:=SUMIFS([$PARTITE.D4:.D48];[$PARTITE.C4:.C48];[.A11])+SUMIFS([$PARTITE.F4:.F48];[$PARTITE.G4:.G48];[.A11])" office:value-type="float" office:value="0" calcext:value-type="float">
            <text:p>0</text:p>
          </table:table-cell>
          <table:table-cell table:formula="of:=SUMIFS([$PARTITE.F4:.F48];[$PARTITE.C4:.C48];[.A11])+SUMIFS([$PARTITE.D4:.D48];[$PARTITE.G4:.G48];[.A11])" office:value-type="float" office:value="0" calcext:value-type="float">
            <text:p>0</text:p>
          </table:table-cell>
          <table:table-cell table:formula="of:=[.C11]*3+[.D11]" office:value-type="float" office:value="0" calcext:value-type="float">
            <text:p>0</text:p>
          </table:table-cell>
          <table:table-cell table:formula="of:=RANK([.H11];[.H$2:.H$11];0)" office:value-type="float" office:value="2" calcext:value-type="float">
            <text:p>2</text:p>
          </table:table-cell>
          <table:table-cell table:style-name="Default" table:number-columns-repeated="16375"/>
        </table:table-row>
      </table:table>
      <table:table table:name="CLASSIFICA" table:style-name="ta5">
        <office:forms form:automatic-focus="false" form:apply-design-mode="false"/>
        <table:table-column table:style-name="co14" table:default-cell-style-name="ce22"/>
        <table:table-column table:style-name="co6" table:default-cell-style-name="ce27"/>
        <table:table-column table:style-name="co4" table:default-cell-style-name="ce22"/>
        <table:table-column table:style-name="co4" table:default-cell-style-name="ce29"/>
        <table:table-column table:style-name="co4" table:number-columns-repeated="2" table:default-cell-style-name="ce22"/>
        <table:table-column table:style-name="co5" table:number-columns-repeated="4" table:default-cell-style-name="ce22"/>
        <table:table-column table:style-name="co3" table:number-columns-repeated="16374"/>
        <table:table-row table:style-name="ro4">
          <table:table-cell table:style-name="ce6" office:value-type="string" calcext:value-type="string" table:number-columns-spanned="10" table:number-rows-spanned="1">
            <text:p>KAIROS CUP 2025 — CLASSIFICA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2">
          <table:table-cell table:style-name="ce8" office:value-type="string" calcext:value-type="string">
            <text:p>Pos</text:p>
          </table:table-cell>
          <table:table-cell table:style-name="ce8" office:value-type="string" calcext:value-type="string">
            <text:p>Squadr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GF</text:p>
          </table:table-cell>
          <table:table-cell table:style-name="ce8" office:value-type="string" calcext:value-type="string">
            <text:p>GS</text:p>
          </table:table-cell>
          <table:table-cell table:style-name="ce8" office:value-type="string" calcext:value-type="string">
            <text:p>Dr</text:p>
          </table:table-cell>
          <table:table-cell table:style-name="ce8" office:value-type="string" calcext:value-type="string">
            <text:p>Pt</text:p>
          </table:table-cell>
          <table:table-cell table:style-name="Default" table:number-columns-repeated="16374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4" table:formula="of:=IFERROR(INDEX([$_CALC.A$2:.A$11];MATCH(1;[$_CALC.I$2:.I$11];0));&quot;&quot;)" office:value-type="string" office:string-value="Torino 1" calcext:value-type="string">
            <text:p>Torino 1</text:p>
          </table:table-cell>
          <table:table-cell table:style-name="ce20" table:formula="of:=IFERROR(INDEX([$_CALC.B$2:.B$11];MATCH(1;[$_CALC.I$2:.I$11];0));&quot;&quot;)" office:value-type="float" office:value="1" calcext:value-type="float">
            <text:p>1</text:p>
          </table:table-cell>
          <table:table-cell table:style-name="ce20" table:formula="of:=IFERROR(INDEX([$_CALC.C$2:.C$11];MATCH(1;[$_CALC.I$2:.I$11];0));&quot;&quot;)" office:value-type="float" office:value="1" calcext:value-type="float">
            <text:p>1</text:p>
          </table:table-cell>
          <table:table-cell table:style-name="ce20" table:formula="of:=IFERROR(INDEX([$_CALC.D$2:.D$11];MATCH(1;[$_CALC.I$2:.I$11];0));&quot;&quot;)" office:value-type="float" office:value="0" calcext:value-type="float">
            <text:p>0</text:p>
          </table:table-cell>
          <table:table-cell table:style-name="ce20" table:formula="of:=IFERROR(INDEX([$_CALC.E$2:.E$11];MATCH(1;[$_CALC.I$2:.I$11];0));&quot;&quot;)" office:value-type="float" office:value="0" calcext:value-type="float">
            <text:p>0</text:p>
          </table:table-cell>
          <table:table-cell table:style-name="ce20" table:formula="of:=IFERROR(INDEX([$_CALC.F$2:.F$11];MATCH(1;[$_CALC.I$2:.I$11];0));&quot;&quot;)" office:value-type="float" office:value="21" calcext:value-type="float">
            <text:p>21</text:p>
          </table:table-cell>
          <table:table-cell table:style-name="ce20" table:formula="of:=IFERROR(INDEX([$_CALC.G$2:.G$11];MATCH(1;[$_CALC.I$2:.I$11];0));&quot;&quot;)" office:value-type="float" office:value="7" calcext:value-type="float">
            <text:p>7</text:p>
          </table:table-cell>
          <table:table-cell table:style-name="ce20" table:formula="of:=IFERROR(INDEX([$_CALC.F$2:.F$11];MATCH(1;[$_CALC.I$2:.I$11];0))-INDEX([$_CALC.G$2:.G$11];MATCH(1;[$_CALC.I$2:.I$11];0));&quot;&quot;)" office:value-type="float" office:value="14" calcext:value-type="float">
            <text:p>14</text:p>
          </table:table-cell>
          <table:table-cell table:style-name="ce20" table:formula="of:=IFERROR(INDEX([$_CALC.H$2:.H$11];MATCH(1;[$_CALC.I$2:.I$11];0));&quot;&quot;)" office:value-type="float" office:value="3" calcext:value-type="float">
            <text:p>3</text:p>
          </table:table-cell>
          <table:table-cell table:style-name="Default" table:number-columns-repeated="1637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5" table:formula="of:=IFERROR(INDEX([$_CALC.A$2:.A$11];MATCH(2;[$_CALC.I$2:.I$11];0));&quot;&quot;)" office:value-type="string" office:string-value="Torino 2" calcext:value-type="string">
            <text:p>Torino 2</text:p>
          </table:table-cell>
          <table:table-cell table:style-name="ce21" table:formula="of:=IFERROR(INDEX([$_CALC.B$2:.B$11];MATCH(2;[$_CALC.I$2:.I$11];0));&quot;&quot;)" office:value-type="float" office:value="1" calcext:value-type="float">
            <text:p>1</text:p>
          </table:table-cell>
          <table:table-cell table:style-name="ce21" table:formula="of:=IFERROR(INDEX([$_CALC.C$2:.C$11];MATCH(2;[$_CALC.I$2:.I$11];0));&quot;&quot;)" office:value-type="float" office:value="0" calcext:value-type="float">
            <text:p>0</text:p>
          </table:table-cell>
          <table:table-cell table:style-name="ce21" table:formula="of:=IFERROR(INDEX([$_CALC.D$2:.D$11];MATCH(2;[$_CALC.I$2:.I$11];0));&quot;&quot;)" office:value-type="float" office:value="0" calcext:value-type="float">
            <text:p>0</text:p>
          </table:table-cell>
          <table:table-cell table:style-name="ce21" table:formula="of:=IFERROR(INDEX([$_CALC.E$2:.E$11];MATCH(2;[$_CALC.I$2:.I$11];0));&quot;&quot;)" office:value-type="float" office:value="1" calcext:value-type="float">
            <text:p>1</text:p>
          </table:table-cell>
          <table:table-cell table:style-name="ce21" table:formula="of:=IFERROR(INDEX([$_CALC.F$2:.F$11];MATCH(2;[$_CALC.I$2:.I$11];0));&quot;&quot;)" office:value-type="float" office:value="7" calcext:value-type="float">
            <text:p>7</text:p>
          </table:table-cell>
          <table:table-cell table:style-name="ce21" table:formula="of:=IFERROR(INDEX([$_CALC.G$2:.G$11];MATCH(2;[$_CALC.I$2:.I$11];0));&quot;&quot;)" office:value-type="float" office:value="21" calcext:value-type="float">
            <text:p>21</text:p>
          </table:table-cell>
          <table:table-cell table:style-name="ce21" table:formula="of:=IFERROR(INDEX([$_CALC.F$2:.F$11];MATCH(2;[$_CALC.I$2:.I$11];0))-INDEX([$_CALC.G$2:.G$11];MATCH(2;[$_CALC.I$2:.I$11];0));&quot;&quot;)" office:value-type="float" office:value="-14" calcext:value-type="float">
            <text:p>-14</text:p>
          </table:table-cell>
          <table:table-cell table:style-name="ce31" table:formula="of:=IFERROR(INDEX([$_CALC.H$2:.H$11];MATCH(2;[$_CALC.I$2:.I$11];0));&quot;&quot;)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26" table:formula="of:=IFERROR(INDEX([$_CALC.A$2:.A$11];MATCH(3;[$_CALC.I$2:.I$11];0));&quot;&quot;)">
            <text:p/>
          </table:table-cell>
          <table:table-cell table:style-name="ce11" table:formula="of:=IFERROR(INDEX([$_CALC.B$2:.B$11];MATCH(3;[$_CALC.I$2:.I$11];0));&quot;&quot;)">
            <text:p/>
          </table:table-cell>
          <table:table-cell table:style-name="ce11" table:formula="of:=IFERROR(INDEX([$_CALC.C$2:.C$11];MATCH(3;[$_CALC.I$2:.I$11];0));&quot;&quot;)">
            <text:p/>
          </table:table-cell>
          <table:table-cell table:style-name="ce11" table:formula="of:=IFERROR(INDEX([$_CALC.D$2:.D$11];MATCH(3;[$_CALC.I$2:.I$11];0));&quot;&quot;)">
            <text:p/>
          </table:table-cell>
          <table:table-cell table:style-name="ce11" table:formula="of:=IFERROR(INDEX([$_CALC.E$2:.E$11];MATCH(3;[$_CALC.I$2:.I$11];0));&quot;&quot;)">
            <text:p/>
          </table:table-cell>
          <table:table-cell table:style-name="ce11" table:formula="of:=IFERROR(INDEX([$_CALC.F$2:.F$11];MATCH(3;[$_CALC.I$2:.I$11];0));&quot;&quot;)">
            <text:p/>
          </table:table-cell>
          <table:table-cell table:style-name="ce11" table:formula="of:=IFERROR(INDEX([$_CALC.G$2:.G$11];MATCH(3;[$_CALC.I$2:.I$11];0));&quot;&quot;)">
            <text:p/>
          </table:table-cell>
          <table:table-cell table:style-name="ce11" table:formula="of:=IFERROR(INDEX([$_CALC.F$2:.F$11];MATCH(3;[$_CALC.I$2:.I$11];0))-INDEX([$_CALC.G$2:.G$11];MATCH(3;[$_CALC.I$2:.I$11];0));&quot;&quot;)">
            <text:p/>
          </table:table-cell>
          <table:table-cell table:style-name="ce32" table:formula="of:=IFERROR(INDEX([$_CALC.H$2:.H$11];MATCH(3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ERROR(INDEX([$_CALC.A$2:.A$11];MATCH(4;[$_CALC.I$2:.I$11];0));&quot;&quot;)">
            <text:p/>
          </table:table-cell>
          <table:table-cell table:formula="of:=IFERROR(INDEX([$_CALC.B$2:.B$11];MATCH(4;[$_CALC.I$2:.I$11];0));&quot;&quot;)">
            <text:p/>
          </table:table-cell>
          <table:table-cell table:style-name="ce22" table:formula="of:=IFERROR(INDEX([$_CALC.C$2:.C$11];MATCH(4;[$_CALC.I$2:.I$11];0));&quot;&quot;)">
            <text:p/>
          </table:table-cell>
          <table:table-cell table:formula="of:=IFERROR(INDEX([$_CALC.D$2:.D$11];MATCH(4;[$_CALC.I$2:.I$11];0));&quot;&quot;)">
            <text:p/>
          </table:table-cell>
          <table:table-cell table:formula="of:=IFERROR(INDEX([$_CALC.E$2:.E$11];MATCH(4;[$_CALC.I$2:.I$11];0));&quot;&quot;)">
            <text:p/>
          </table:table-cell>
          <table:table-cell table:formula="of:=IFERROR(INDEX([$_CALC.F$2:.F$11];MATCH(4;[$_CALC.I$2:.I$11];0));&quot;&quot;)">
            <text:p/>
          </table:table-cell>
          <table:table-cell table:formula="of:=IFERROR(INDEX([$_CALC.G$2:.G$11];MATCH(4;[$_CALC.I$2:.I$11];0));&quot;&quot;)">
            <text:p/>
          </table:table-cell>
          <table:table-cell table:formula="of:=IFERROR(INDEX([$_CALC.F$2:.F$11];MATCH(4;[$_CALC.I$2:.I$11];0))-INDEX([$_CALC.G$2:.G$11];MATCH(4;[$_CALC.I$2:.I$11];0));&quot;&quot;)">
            <text:p/>
          </table:table-cell>
          <table:table-cell table:style-name="ce29" table:formula="of:=IFERROR(INDEX([$_CALC.H$2:.H$11];MATCH(4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8" table:formula="of:=IFERROR(INDEX([$_CALC.A$2:.A$11];MATCH(5;[$_CALC.I$2:.I$11];0));&quot;&quot;)">
            <text:p/>
          </table:table-cell>
          <table:table-cell table:style-name="ce9" table:formula="of:=IFERROR(INDEX([$_CALC.B$2:.B$11];MATCH(5;[$_CALC.I$2:.I$11];0));&quot;&quot;)">
            <text:p/>
          </table:table-cell>
          <table:table-cell table:style-name="ce9" table:formula="of:=IFERROR(INDEX([$_CALC.C$2:.C$11];MATCH(5;[$_CALC.I$2:.I$11];0));&quot;&quot;)">
            <text:p/>
          </table:table-cell>
          <table:table-cell table:style-name="ce9" table:formula="of:=IFERROR(INDEX([$_CALC.D$2:.D$11];MATCH(5;[$_CALC.I$2:.I$11];0));&quot;&quot;)">
            <text:p/>
          </table:table-cell>
          <table:table-cell table:style-name="ce9" table:formula="of:=IFERROR(INDEX([$_CALC.E$2:.E$11];MATCH(5;[$_CALC.I$2:.I$11];0));&quot;&quot;)">
            <text:p/>
          </table:table-cell>
          <table:table-cell table:style-name="ce9" table:formula="of:=IFERROR(INDEX([$_CALC.F$2:.F$11];MATCH(5;[$_CALC.I$2:.I$11];0));&quot;&quot;)">
            <text:p/>
          </table:table-cell>
          <table:table-cell table:style-name="ce9" table:formula="of:=IFERROR(INDEX([$_CALC.G$2:.G$11];MATCH(5;[$_CALC.I$2:.I$11];0));&quot;&quot;)">
            <text:p/>
          </table:table-cell>
          <table:table-cell table:style-name="ce9" table:formula="of:=IFERROR(INDEX([$_CALC.F$2:.F$11];MATCH(5;[$_CALC.I$2:.I$11];0))-INDEX([$_CALC.G$2:.G$11];MATCH(5;[$_CALC.I$2:.I$11];0));&quot;&quot;)">
            <text:p/>
          </table:table-cell>
          <table:table-cell table:style-name="ce30" table:formula="of:=IFERROR(INDEX([$_CALC.H$2:.H$11];MATCH(5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FERROR(INDEX([$_CALC.A$2:.A$11];MATCH(6;[$_CALC.I$2:.I$11];0));&quot;&quot;)">
            <text:p/>
          </table:table-cell>
          <table:table-cell table:formula="of:=IFERROR(INDEX([$_CALC.B$2:.B$11];MATCH(6;[$_CALC.I$2:.I$11];0));&quot;&quot;)">
            <text:p/>
          </table:table-cell>
          <table:table-cell table:style-name="ce22" table:formula="of:=IFERROR(INDEX([$_CALC.C$2:.C$11];MATCH(6;[$_CALC.I$2:.I$11];0));&quot;&quot;)">
            <text:p/>
          </table:table-cell>
          <table:table-cell table:formula="of:=IFERROR(INDEX([$_CALC.D$2:.D$11];MATCH(6;[$_CALC.I$2:.I$11];0));&quot;&quot;)">
            <text:p/>
          </table:table-cell>
          <table:table-cell table:formula="of:=IFERROR(INDEX([$_CALC.E$2:.E$11];MATCH(6;[$_CALC.I$2:.I$11];0));&quot;&quot;)">
            <text:p/>
          </table:table-cell>
          <table:table-cell table:formula="of:=IFERROR(INDEX([$_CALC.F$2:.F$11];MATCH(6;[$_CALC.I$2:.I$11];0));&quot;&quot;)">
            <text:p/>
          </table:table-cell>
          <table:table-cell table:formula="of:=IFERROR(INDEX([$_CALC.G$2:.G$11];MATCH(6;[$_CALC.I$2:.I$11];0));&quot;&quot;)">
            <text:p/>
          </table:table-cell>
          <table:table-cell table:formula="of:=IFERROR(INDEX([$_CALC.F$2:.F$11];MATCH(6;[$_CALC.I$2:.I$11];0))-INDEX([$_CALC.G$2:.G$11];MATCH(6;[$_CALC.I$2:.I$11];0));&quot;&quot;)">
            <text:p/>
          </table:table-cell>
          <table:table-cell table:style-name="ce29" table:formula="of:=IFERROR(INDEX([$_CALC.H$2:.H$11];MATCH(6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8" table:formula="of:=IFERROR(INDEX([$_CALC.A$2:.A$11];MATCH(7;[$_CALC.I$2:.I$11];0));&quot;&quot;)">
            <text:p/>
          </table:table-cell>
          <table:table-cell table:style-name="ce9" table:formula="of:=IFERROR(INDEX([$_CALC.B$2:.B$11];MATCH(7;[$_CALC.I$2:.I$11];0));&quot;&quot;)">
            <text:p/>
          </table:table-cell>
          <table:table-cell table:style-name="ce9" table:formula="of:=IFERROR(INDEX([$_CALC.C$2:.C$11];MATCH(7;[$_CALC.I$2:.I$11];0));&quot;&quot;)">
            <text:p/>
          </table:table-cell>
          <table:table-cell table:style-name="ce9" table:formula="of:=IFERROR(INDEX([$_CALC.D$2:.D$11];MATCH(7;[$_CALC.I$2:.I$11];0));&quot;&quot;)">
            <text:p/>
          </table:table-cell>
          <table:table-cell table:style-name="ce9" table:formula="of:=IFERROR(INDEX([$_CALC.E$2:.E$11];MATCH(7;[$_CALC.I$2:.I$11];0));&quot;&quot;)">
            <text:p/>
          </table:table-cell>
          <table:table-cell table:style-name="ce9" table:formula="of:=IFERROR(INDEX([$_CALC.F$2:.F$11];MATCH(7;[$_CALC.I$2:.I$11];0));&quot;&quot;)">
            <text:p/>
          </table:table-cell>
          <table:table-cell table:style-name="ce9" table:formula="of:=IFERROR(INDEX([$_CALC.G$2:.G$11];MATCH(7;[$_CALC.I$2:.I$11];0));&quot;&quot;)">
            <text:p/>
          </table:table-cell>
          <table:table-cell table:style-name="ce9" table:formula="of:=IFERROR(INDEX([$_CALC.F$2:.F$11];MATCH(7;[$_CALC.I$2:.I$11];0))-INDEX([$_CALC.G$2:.G$11];MATCH(7;[$_CALC.I$2:.I$11];0));&quot;&quot;)">
            <text:p/>
          </table:table-cell>
          <table:table-cell table:style-name="ce30" table:formula="of:=IFERROR(INDEX([$_CALC.H$2:.H$11];MATCH(7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ERROR(INDEX([$_CALC.A$2:.A$11];MATCH(8;[$_CALC.I$2:.I$11];0));&quot;&quot;)">
            <text:p/>
          </table:table-cell>
          <table:table-cell table:formula="of:=IFERROR(INDEX([$_CALC.B$2:.B$11];MATCH(8;[$_CALC.I$2:.I$11];0));&quot;&quot;)">
            <text:p/>
          </table:table-cell>
          <table:table-cell table:style-name="ce22" table:formula="of:=IFERROR(INDEX([$_CALC.C$2:.C$11];MATCH(8;[$_CALC.I$2:.I$11];0));&quot;&quot;)">
            <text:p/>
          </table:table-cell>
          <table:table-cell table:formula="of:=IFERROR(INDEX([$_CALC.D$2:.D$11];MATCH(8;[$_CALC.I$2:.I$11];0));&quot;&quot;)">
            <text:p/>
          </table:table-cell>
          <table:table-cell table:formula="of:=IFERROR(INDEX([$_CALC.E$2:.E$11];MATCH(8;[$_CALC.I$2:.I$11];0));&quot;&quot;)">
            <text:p/>
          </table:table-cell>
          <table:table-cell table:formula="of:=IFERROR(INDEX([$_CALC.F$2:.F$11];MATCH(8;[$_CALC.I$2:.I$11];0));&quot;&quot;)">
            <text:p/>
          </table:table-cell>
          <table:table-cell table:formula="of:=IFERROR(INDEX([$_CALC.G$2:.G$11];MATCH(8;[$_CALC.I$2:.I$11];0));&quot;&quot;)">
            <text:p/>
          </table:table-cell>
          <table:table-cell table:formula="of:=IFERROR(INDEX([$_CALC.F$2:.F$11];MATCH(8;[$_CALC.I$2:.I$11];0))-INDEX([$_CALC.G$2:.G$11];MATCH(8;[$_CALC.I$2:.I$11];0));&quot;&quot;)">
            <text:p/>
          </table:table-cell>
          <table:table-cell table:style-name="ce29" table:formula="of:=IFERROR(INDEX([$_CALC.H$2:.H$11];MATCH(8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8" table:formula="of:=IFERROR(INDEX([$_CALC.A$2:.A$11];MATCH(9;[$_CALC.I$2:.I$11];0));&quot;&quot;)">
            <text:p/>
          </table:table-cell>
          <table:table-cell table:style-name="ce9" table:formula="of:=IFERROR(INDEX([$_CALC.B$2:.B$11];MATCH(9;[$_CALC.I$2:.I$11];0));&quot;&quot;)">
            <text:p/>
          </table:table-cell>
          <table:table-cell table:style-name="ce9" table:formula="of:=IFERROR(INDEX([$_CALC.C$2:.C$11];MATCH(9;[$_CALC.I$2:.I$11];0));&quot;&quot;)">
            <text:p/>
          </table:table-cell>
          <table:table-cell table:style-name="ce9" table:formula="of:=IFERROR(INDEX([$_CALC.D$2:.D$11];MATCH(9;[$_CALC.I$2:.I$11];0));&quot;&quot;)">
            <text:p/>
          </table:table-cell>
          <table:table-cell table:style-name="ce9" table:formula="of:=IFERROR(INDEX([$_CALC.E$2:.E$11];MATCH(9;[$_CALC.I$2:.I$11];0));&quot;&quot;)">
            <text:p/>
          </table:table-cell>
          <table:table-cell table:style-name="ce9" table:formula="of:=IFERROR(INDEX([$_CALC.F$2:.F$11];MATCH(9;[$_CALC.I$2:.I$11];0));&quot;&quot;)">
            <text:p/>
          </table:table-cell>
          <table:table-cell table:style-name="ce9" table:formula="of:=IFERROR(INDEX([$_CALC.G$2:.G$11];MATCH(9;[$_CALC.I$2:.I$11];0));&quot;&quot;)">
            <text:p/>
          </table:table-cell>
          <table:table-cell table:style-name="ce9" table:formula="of:=IFERROR(INDEX([$_CALC.F$2:.F$11];MATCH(9;[$_CALC.I$2:.I$11];0))-INDEX([$_CALC.G$2:.G$11];MATCH(9;[$_CALC.I$2:.I$11];0));&quot;&quot;)">
            <text:p/>
          </table:table-cell>
          <table:table-cell table:style-name="ce30" table:formula="of:=IFERROR(INDEX([$_CALC.H$2:.H$11];MATCH(9;[$_CALC.I$2:.I$11];0));&quot;&quot;)">
            <text:p/>
          </table:table-cell>
          <table:table-cell table:style-name="Default"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FERROR(INDEX([$_CALC.A$2:.A$11];MATCH(10;[$_CALC.I$2:.I$11];0));&quot;&quot;)">
            <text:p/>
          </table:table-cell>
          <table:table-cell table:formula="of:=IFERROR(INDEX([$_CALC.B$2:.B$11];MATCH(10;[$_CALC.I$2:.I$11];0));&quot;&quot;)">
            <text:p/>
          </table:table-cell>
          <table:table-cell table:style-name="ce22" table:formula="of:=IFERROR(INDEX([$_CALC.C$2:.C$11];MATCH(10;[$_CALC.I$2:.I$11];0));&quot;&quot;)">
            <text:p/>
          </table:table-cell>
          <table:table-cell table:formula="of:=IFERROR(INDEX([$_CALC.D$2:.D$11];MATCH(10;[$_CALC.I$2:.I$11];0));&quot;&quot;)">
            <text:p/>
          </table:table-cell>
          <table:table-cell table:formula="of:=IFERROR(INDEX([$_CALC.E$2:.E$11];MATCH(10;[$_CALC.I$2:.I$11];0));&quot;&quot;)">
            <text:p/>
          </table:table-cell>
          <table:table-cell table:formula="of:=IFERROR(INDEX([$_CALC.F$2:.F$11];MATCH(10;[$_CALC.I$2:.I$11];0));&quot;&quot;)">
            <text:p/>
          </table:table-cell>
          <table:table-cell table:formula="of:=IFERROR(INDEX([$_CALC.G$2:.G$11];MATCH(10;[$_CALC.I$2:.I$11];0));&quot;&quot;)">
            <text:p/>
          </table:table-cell>
          <table:table-cell table:formula="of:=IFERROR(INDEX([$_CALC.F$2:.F$11];MATCH(10;[$_CALC.I$2:.I$11];0))-INDEX([$_CALC.G$2:.G$11];MATCH(10;[$_CALC.I$2:.I$11];0));&quot;&quot;)">
            <text:p/>
          </table:table-cell>
          <table:table-cell table:style-name="ce29" table:formula="of:=IFERROR(INDEX([$_CALC.H$2:.H$11];MATCH(10;[$_CALC.I$2:.I$11];0));&quot;&quot;)">
            <text:p/>
          </table:table-cell>
          <table:table-cell table:style-name="Default" table:number-columns-repeated="16374"/>
        </table:table-row>
        <table:table-row table:style-name="ro3">
          <table:table-cell table:style-name="Default" table:number-columns-repeated="16384"/>
        </table:table-row>
        <table:table-row table:style-name="ro5">
          <table:table-cell table:style-name="ce23" office:value-type="string" calcext:value-type="string" table:number-columns-spanned="10" table:number-rows-spanned="1">
            <text:p>CLASSIFICA CANNONIERI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2">
          <table:table-cell table:style-name="ce8" office:value-type="string" calcext:value-type="string">
            <text:p>Pos</text:p>
          </table:table-cell>
          <table:table-cell table:style-name="ce8" office:value-type="string" calcext:value-type="string">
            <text:p>Cognome e Nome</text:p>
          </table:table-cell>
          <table:table-cell table:style-name="ce8" office:value-type="string" calcext:value-type="string">
            <text:p>Squadra</text:p>
          </table:table-cell>
          <table:table-cell table:style-name="ce8" office:value-type="string" calcext:value-type="string">
            <text:p>Gol</text:p>
          </table:table-cell>
          <table:table-cell table:style-name="ce8" office:value-type="string" calcext:value-type="string">
            <text:p>Assist</text:p>
          </table:table-cell>
          <table:table-cell table:style-name="ce8" office:value-type="string" calcext:value-type="string">
            <text:p>Voto</text:p>
          </table:table-cell>
          <table:table-cell table:style-name="ce8" office:value-type="string" calcext:value-type="string">
            <text:p>Presenze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8">
          <table:table-cell table:style-name="ce20" office:value-type="float" office:value="1" calcext:value-type="float">
            <text:p>1</text:p>
          </table:table-cell>
          <table:table-cell table:style-name="ce24" table:formula="of:=IFERROR(INDEX([$GIOCATORI.C$3:.C$202];MATCH(LARGE([$GIOCATORI.E$3:.E$202];1);[$GIOCATORI.E$3:.E$202];0));&quot;&quot;)" office:value-type="string" office:string-value="Trento Simone" calcext:value-type="string">
            <text:p>Trento Simone</text:p>
          </table:table-cell>
          <table:table-cell table:style-name="ce20" table:formula="of:=IFERROR(INDEX([$GIOCATORI.D$3:.D$202];MATCH(LARGE([$GIOCATORI.E$3:.E$202];1);[$GIOCATORI.E$3:.E$202];0));&quot;&quot;)" office:value-type="string" office:string-value="Torino 1" calcext:value-type="string">
            <text:p>Torino 1</text:p>
          </table:table-cell>
          <table:table-cell table:style-name="ce20" table:formula="of:=IFERROR(INDEX([$GIOCATORI.E$3:.E$202];MATCH(LARGE([$GIOCATORI.E$3:.E$202];1);[$GIOCATORI.E$3:.E$202];0));&quot;&quot;)" office:value-type="float" office:value="7" calcext:value-type="float">
            <text:p>7</text:p>
          </table:table-cell>
          <table:table-cell table:style-name="ce20" table:formula="of:=IFERROR(INDEX([$GIOCATORI.F$3:.F$202];MATCH(LARGE([$GIOCATORI.E$3:.E$202];1);[$GIOCATORI.E$3:.E$202];0));&quot;&quot;)" office:value-type="float" office:value="11" calcext:value-type="float">
            <text:p>11</text:p>
          </table:table-cell>
          <table:table-cell table:style-name="ce20" table:formula="of:=IFERROR(INDEX([$GIOCATORI.G$3:.G$202];MATCH(LARGE([$GIOCATORI.E$3:.E$202];1);[$GIOCATORI.E$3:.E$202];0));&quot;&quot;)" office:value-type="float" office:value="9" calcext:value-type="float">
            <text:p>9</text:p>
          </table:table-cell>
          <table:table-cell table:style-name="ce20" table:formula="of:=IFERROR(INDEX([$GIOCATORI.H$3:.H$202];MATCH(LARGE([$GIOCATORI.E$3:.E$202];1);[$GIOCATORI.E$3:.E$202];0));&quot;&quot;)" office:value-type="float" office:value="1" calcext:value-type="float">
            <text:p>1</text:p>
          </table:table-cell>
          <table:table-cell table:style-name="ce20" table:number-columns-repeated="3"/>
          <table:table-cell table:style-name="Default" table:number-columns-repeated="1637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IFERROR(INDEX([$GIOCATORI.C$3:.C$202];MATCH(LARGE([$GIOCATORI.E$3:.E$202];2);[$GIOCATORI.E$3:.E$202];0));&quot;&quot;)">
            <text:p/>
          </table:table-cell>
          <table:table-cell table:formula="of:=IFERROR(INDEX([$GIOCATORI.D$3:.D$202];MATCH(LARGE([$GIOCATORI.E$3:.E$202];2);[$GIOCATORI.E$3:.E$202];0));&quot;&quot;)">
            <text:p/>
          </table:table-cell>
          <table:table-cell table:formula="of:=IFERROR(INDEX([$GIOCATORI.E$3:.E$202];MATCH(LARGE([$GIOCATORI.E$3:.E$202];2);[$GIOCATORI.E$3:.E$202];0));&quot;&quot;)">
            <text:p/>
          </table:table-cell>
          <table:table-cell table:formula="of:=IFERROR(INDEX([$GIOCATORI.F$3:.F$202];MATCH(LARGE([$GIOCATORI.E$3:.E$202];2);[$GIOCATORI.E$3:.E$202];0));&quot;&quot;)">
            <text:p/>
          </table:table-cell>
          <table:table-cell table:formula="of:=IFERROR(INDEX([$GIOCATORI.G$3:.G$202];MATCH(LARGE([$GIOCATORI.E$3:.E$202];2);[$GIOCATORI.E$3:.E$202];0));&quot;&quot;)">
            <text:p/>
          </table:table-cell>
          <table:table-cell table:formula="of:=IFERROR(INDEX([$GIOCATORI.H$3:.H$202];MATCH(LARGE([$GIOCATORI.E$3:.E$202];2);[$GIOCATORI.E$3:.E$202];0));&quot;&quot;)">
            <text:p/>
          </table:table-cell>
          <table:table-cell table:number-columns-repeated="3"/>
          <table:table-cell table:style-name="Default" table:number-columns-repeated="1637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28" table:formula="of:=IFERROR(INDEX([$GIOCATORI.C$3:.C$202];MATCH(LARGE([$GIOCATORI.E$3:.E$202];3);[$GIOCATORI.E$3:.E$202];0));&quot;&quot;)">
            <text:p/>
          </table:table-cell>
          <table:table-cell table:style-name="ce9" table:formula="of:=IFERROR(INDEX([$GIOCATORI.D$3:.D$202];MATCH(LARGE([$GIOCATORI.E$3:.E$202];3);[$GIOCATORI.E$3:.E$202];0));&quot;&quot;)">
            <text:p/>
          </table:table-cell>
          <table:table-cell table:style-name="ce30" table:formula="of:=IFERROR(INDEX([$GIOCATORI.E$3:.E$202];MATCH(LARGE([$GIOCATORI.E$3:.E$202];3);[$GIOCATORI.E$3:.E$202];0));&quot;&quot;)">
            <text:p/>
          </table:table-cell>
          <table:table-cell table:style-name="ce9" table:formula="of:=IFERROR(INDEX([$GIOCATORI.F$3:.F$202];MATCH(LARGE([$GIOCATORI.E$3:.E$202];3);[$GIOCATORI.E$3:.E$202];0));&quot;&quot;)">
            <text:p/>
          </table:table-cell>
          <table:table-cell table:style-name="ce9" table:formula="of:=IFERROR(INDEX([$GIOCATORI.G$3:.G$202];MATCH(LARGE([$GIOCATORI.E$3:.E$202];3);[$GIOCATORI.E$3:.E$202];0));&quot;&quot;)">
            <text:p/>
          </table:table-cell>
          <table:table-cell table:style-name="ce9" table:formula="of:=IFERROR(INDEX([$GIOCATORI.H$3:.H$202];MATCH(LARGE([$GIOCATORI.E$3:.E$202];3);[$GIOCATORI.E$3:.E$202];0));&quot;&quot;)">
            <text:p/>
          </table:table-cell>
          <table:table-cell table:style-name="ce9" table:number-columns-repeated="3"/>
          <table:table-cell table:style-name="Default" table:number-columns-repeated="16374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IFERROR(INDEX([$GIOCATORI.C$3:.C$202];MATCH(LARGE([$GIOCATORI.E$3:.E$202];4);[$GIOCATORI.E$3:.E$202];0));&quot;&quot;)">
            <text:p/>
          </table:table-cell>
          <table:table-cell table:formula="of:=IFERROR(INDEX([$GIOCATORI.D$3:.D$202];MATCH(LARGE([$GIOCATORI.E$3:.E$202];4);[$GIOCATORI.E$3:.E$202];0));&quot;&quot;)">
            <text:p/>
          </table:table-cell>
          <table:table-cell table:formula="of:=IFERROR(INDEX([$GIOCATORI.E$3:.E$202];MATCH(LARGE([$GIOCATORI.E$3:.E$202];4);[$GIOCATORI.E$3:.E$202];0));&quot;&quot;)">
            <text:p/>
          </table:table-cell>
          <table:table-cell table:formula="of:=IFERROR(INDEX([$GIOCATORI.F$3:.F$202];MATCH(LARGE([$GIOCATORI.E$3:.E$202];4);[$GIOCATORI.E$3:.E$202];0));&quot;&quot;)">
            <text:p/>
          </table:table-cell>
          <table:table-cell table:formula="of:=IFERROR(INDEX([$GIOCATORI.G$3:.G$202];MATCH(LARGE([$GIOCATORI.E$3:.E$202];4);[$GIOCATORI.E$3:.E$202];0));&quot;&quot;)">
            <text:p/>
          </table:table-cell>
          <table:table-cell table:formula="of:=IFERROR(INDEX([$GIOCATORI.H$3:.H$202];MATCH(LARGE([$GIOCATORI.E$3:.E$202];4);[$GIOCATORI.E$3:.E$202];0));&quot;&quot;)">
            <text:p/>
          </table:table-cell>
          <table:table-cell table:number-columns-repeated="3"/>
          <table:table-cell table:style-name="Default" table:number-columns-repeated="1637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28" table:formula="of:=IFERROR(INDEX([$GIOCATORI.C$3:.C$202];MATCH(LARGE([$GIOCATORI.E$3:.E$202];5);[$GIOCATORI.E$3:.E$202];0));&quot;&quot;)">
            <text:p/>
          </table:table-cell>
          <table:table-cell table:style-name="ce9" table:formula="of:=IFERROR(INDEX([$GIOCATORI.D$3:.D$202];MATCH(LARGE([$GIOCATORI.E$3:.E$202];5);[$GIOCATORI.E$3:.E$202];0));&quot;&quot;)">
            <text:p/>
          </table:table-cell>
          <table:table-cell table:style-name="ce30" table:formula="of:=IFERROR(INDEX([$GIOCATORI.E$3:.E$202];MATCH(LARGE([$GIOCATORI.E$3:.E$202];5);[$GIOCATORI.E$3:.E$202];0));&quot;&quot;)">
            <text:p/>
          </table:table-cell>
          <table:table-cell table:style-name="ce9" table:formula="of:=IFERROR(INDEX([$GIOCATORI.F$3:.F$202];MATCH(LARGE([$GIOCATORI.E$3:.E$202];5);[$GIOCATORI.E$3:.E$202];0));&quot;&quot;)">
            <text:p/>
          </table:table-cell>
          <table:table-cell table:style-name="ce9" table:formula="of:=IFERROR(INDEX([$GIOCATORI.G$3:.G$202];MATCH(LARGE([$GIOCATORI.E$3:.E$202];5);[$GIOCATORI.E$3:.E$202];0));&quot;&quot;)">
            <text:p/>
          </table:table-cell>
          <table:table-cell table:style-name="ce9" table:formula="of:=IFERROR(INDEX([$GIOCATORI.H$3:.H$202];MATCH(LARGE([$GIOCATORI.E$3:.E$202];5);[$GIOCATORI.E$3:.E$202];0));&quot;&quot;)">
            <text:p/>
          </table:table-cell>
          <table:table-cell table:style-name="ce9" table:number-columns-repeated="3"/>
          <table:table-cell table:style-name="Default" table:number-columns-repeated="16374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IFERROR(INDEX([$GIOCATORI.C$3:.C$202];MATCH(LARGE([$GIOCATORI.E$3:.E$202];6);[$GIOCATORI.E$3:.E$202];0));&quot;&quot;)">
            <text:p/>
          </table:table-cell>
          <table:table-cell table:formula="of:=IFERROR(INDEX([$GIOCATORI.D$3:.D$202];MATCH(LARGE([$GIOCATORI.E$3:.E$202];6);[$GIOCATORI.E$3:.E$202];0));&quot;&quot;)">
            <text:p/>
          </table:table-cell>
          <table:table-cell table:formula="of:=IFERROR(INDEX([$GIOCATORI.E$3:.E$202];MATCH(LARGE([$GIOCATORI.E$3:.E$202];6);[$GIOCATORI.E$3:.E$202];0));&quot;&quot;)">
            <text:p/>
          </table:table-cell>
          <table:table-cell table:formula="of:=IFERROR(INDEX([$GIOCATORI.F$3:.F$202];MATCH(LARGE([$GIOCATORI.E$3:.E$202];6);[$GIOCATORI.E$3:.E$202];0));&quot;&quot;)">
            <text:p/>
          </table:table-cell>
          <table:table-cell table:formula="of:=IFERROR(INDEX([$GIOCATORI.G$3:.G$202];MATCH(LARGE([$GIOCATORI.E$3:.E$202];6);[$GIOCATORI.E$3:.E$202];0));&quot;&quot;)">
            <text:p/>
          </table:table-cell>
          <table:table-cell table:formula="of:=IFERROR(INDEX([$GIOCATORI.H$3:.H$202];MATCH(LARGE([$GIOCATORI.E$3:.E$202];6);[$GIOCATORI.E$3:.E$202];0));&quot;&quot;)">
            <text:p/>
          </table:table-cell>
          <table:table-cell table:number-columns-repeated="3"/>
          <table:table-cell table:style-name="Default" table:number-columns-repeated="1637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28" table:formula="of:=IFERROR(INDEX([$GIOCATORI.C$3:.C$202];MATCH(LARGE([$GIOCATORI.E$3:.E$202];7);[$GIOCATORI.E$3:.E$202];0));&quot;&quot;)">
            <text:p/>
          </table:table-cell>
          <table:table-cell table:style-name="ce9" table:formula="of:=IFERROR(INDEX([$GIOCATORI.D$3:.D$202];MATCH(LARGE([$GIOCATORI.E$3:.E$202];7);[$GIOCATORI.E$3:.E$202];0));&quot;&quot;)">
            <text:p/>
          </table:table-cell>
          <table:table-cell table:style-name="ce30" table:formula="of:=IFERROR(INDEX([$GIOCATORI.E$3:.E$202];MATCH(LARGE([$GIOCATORI.E$3:.E$202];7);[$GIOCATORI.E$3:.E$202];0));&quot;&quot;)">
            <text:p/>
          </table:table-cell>
          <table:table-cell table:style-name="ce9" table:formula="of:=IFERROR(INDEX([$GIOCATORI.F$3:.F$202];MATCH(LARGE([$GIOCATORI.E$3:.E$202];7);[$GIOCATORI.E$3:.E$202];0));&quot;&quot;)">
            <text:p/>
          </table:table-cell>
          <table:table-cell table:style-name="ce9" table:formula="of:=IFERROR(INDEX([$GIOCATORI.G$3:.G$202];MATCH(LARGE([$GIOCATORI.E$3:.E$202];7);[$GIOCATORI.E$3:.E$202];0));&quot;&quot;)">
            <text:p/>
          </table:table-cell>
          <table:table-cell table:style-name="ce9" table:formula="of:=IFERROR(INDEX([$GIOCATORI.H$3:.H$202];MATCH(LARGE([$GIOCATORI.E$3:.E$202];7);[$GIOCATORI.E$3:.E$202];0));&quot;&quot;)">
            <text:p/>
          </table:table-cell>
          <table:table-cell table:style-name="ce9" table:number-columns-repeated="3"/>
          <table:table-cell table:style-name="Default" table:number-columns-repeated="16374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IFERROR(INDEX([$GIOCATORI.C$3:.C$202];MATCH(LARGE([$GIOCATORI.E$3:.E$202];8);[$GIOCATORI.E$3:.E$202];0));&quot;&quot;)">
            <text:p/>
          </table:table-cell>
          <table:table-cell table:formula="of:=IFERROR(INDEX([$GIOCATORI.D$3:.D$202];MATCH(LARGE([$GIOCATORI.E$3:.E$202];8);[$GIOCATORI.E$3:.E$202];0));&quot;&quot;)">
            <text:p/>
          </table:table-cell>
          <table:table-cell table:formula="of:=IFERROR(INDEX([$GIOCATORI.E$3:.E$202];MATCH(LARGE([$GIOCATORI.E$3:.E$202];8);[$GIOCATORI.E$3:.E$202];0));&quot;&quot;)">
            <text:p/>
          </table:table-cell>
          <table:table-cell table:formula="of:=IFERROR(INDEX([$GIOCATORI.F$3:.F$202];MATCH(LARGE([$GIOCATORI.E$3:.E$202];8);[$GIOCATORI.E$3:.E$202];0));&quot;&quot;)">
            <text:p/>
          </table:table-cell>
          <table:table-cell table:formula="of:=IFERROR(INDEX([$GIOCATORI.G$3:.G$202];MATCH(LARGE([$GIOCATORI.E$3:.E$202];8);[$GIOCATORI.E$3:.E$202];0));&quot;&quot;)">
            <text:p/>
          </table:table-cell>
          <table:table-cell table:formula="of:=IFERROR(INDEX([$GIOCATORI.H$3:.H$202];MATCH(LARGE([$GIOCATORI.E$3:.E$202];8);[$GIOCATORI.E$3:.E$202];0));&quot;&quot;)">
            <text:p/>
          </table:table-cell>
          <table:table-cell table:number-columns-repeated="3"/>
          <table:table-cell table:style-name="Default" table:number-columns-repeated="1637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28" table:formula="of:=IFERROR(INDEX([$GIOCATORI.C$3:.C$202];MATCH(LARGE([$GIOCATORI.E$3:.E$202];9);[$GIOCATORI.E$3:.E$202];0));&quot;&quot;)">
            <text:p/>
          </table:table-cell>
          <table:table-cell table:style-name="ce9" table:formula="of:=IFERROR(INDEX([$GIOCATORI.D$3:.D$202];MATCH(LARGE([$GIOCATORI.E$3:.E$202];9);[$GIOCATORI.E$3:.E$202];0));&quot;&quot;)">
            <text:p/>
          </table:table-cell>
          <table:table-cell table:style-name="ce30" table:formula="of:=IFERROR(INDEX([$GIOCATORI.E$3:.E$202];MATCH(LARGE([$GIOCATORI.E$3:.E$202];9);[$GIOCATORI.E$3:.E$202];0));&quot;&quot;)">
            <text:p/>
          </table:table-cell>
          <table:table-cell table:style-name="ce9" table:formula="of:=IFERROR(INDEX([$GIOCATORI.F$3:.F$202];MATCH(LARGE([$GIOCATORI.E$3:.E$202];9);[$GIOCATORI.E$3:.E$202];0));&quot;&quot;)">
            <text:p/>
          </table:table-cell>
          <table:table-cell table:style-name="ce9" table:formula="of:=IFERROR(INDEX([$GIOCATORI.G$3:.G$202];MATCH(LARGE([$GIOCATORI.E$3:.E$202];9);[$GIOCATORI.E$3:.E$202];0));&quot;&quot;)">
            <text:p/>
          </table:table-cell>
          <table:table-cell table:style-name="ce9" table:formula="of:=IFERROR(INDEX([$GIOCATORI.H$3:.H$202];MATCH(LARGE([$GIOCATORI.E$3:.E$202];9);[$GIOCATORI.E$3:.E$202];0));&quot;&quot;)">
            <text:p/>
          </table:table-cell>
          <table:table-cell table:style-name="ce9" table:number-columns-repeated="3"/>
          <table:table-cell table:style-name="Default" table:number-columns-repeated="16374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IFERROR(INDEX([$GIOCATORI.C$3:.C$202];MATCH(LARGE([$GIOCATORI.E$3:.E$202];10);[$GIOCATORI.E$3:.E$202];0));&quot;&quot;)">
            <text:p/>
          </table:table-cell>
          <table:table-cell table:formula="of:=IFERROR(INDEX([$GIOCATORI.D$3:.D$202];MATCH(LARGE([$GIOCATORI.E$3:.E$202];10);[$GIOCATORI.E$3:.E$202];0));&quot;&quot;)">
            <text:p/>
          </table:table-cell>
          <table:table-cell table:formula="of:=IFERROR(INDEX([$GIOCATORI.E$3:.E$202];MATCH(LARGE([$GIOCATORI.E$3:.E$202];10);[$GIOCATORI.E$3:.E$202];0));&quot;&quot;)">
            <text:p/>
          </table:table-cell>
          <table:table-cell table:formula="of:=IFERROR(INDEX([$GIOCATORI.F$3:.F$202];MATCH(LARGE([$GIOCATORI.E$3:.E$202];10);[$GIOCATORI.E$3:.E$202];0));&quot;&quot;)">
            <text:p/>
          </table:table-cell>
          <table:table-cell table:formula="of:=IFERROR(INDEX([$GIOCATORI.G$3:.G$202];MATCH(LARGE([$GIOCATORI.E$3:.E$202];10);[$GIOCATORI.E$3:.E$202];0));&quot;&quot;)">
            <text:p/>
          </table:table-cell>
          <table:table-cell table:formula="of:=IFERROR(INDEX([$GIOCATORI.H$3:.H$202];MATCH(LARGE([$GIOCATORI.E$3:.E$202];10);[$GIOCATORI.E$3:.E$202];0));&quot;&quot;)">
            <text:p/>
          </table:table-cell>
          <table:table-cell table:number-columns-repeated="3"/>
          <table:table-cell table:style-name="Default" table:number-columns-repeated="16374"/>
        </table:table-row>
      </table:table>
      <table:table table:name="EXPORT_JSON" table:style-name="ta6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3" table:number-columns-repeated="16379"/>
        <table:table-row table:style-name="ro9">
          <table:table-cell table:style-name="ce23" office:value-type="string" calcext:value-type="string" table:number-columns-spanned="4" table:number-rows-spanned="1">
            <text:p>EXPORT JSON — Kairos Cup · Copia il testo dalla cella B6 nel sito web</text:p>
          </table:table-cell>
          <table:covered-table-cell table:number-columns-repeated="3"/>
          <table:table-cell/>
          <table:table-cell table:style-name="Default" table:number-columns-repeated="16379"/>
        </table:table-row>
        <table:table-row table:style-name="ro8">
          <table:table-cell/>
          <table:table-cell table:style-name="ce33" office:value-type="string" calcext:value-type="string">
            <text:p>1. Apri il sito Kairos Cup <text:s/>2. Clicca 'Aggiorna Dati' <text:s/>3. Incolla il contenuto della cella B6 nel campo apposito <text:s/>4. Clicca Conferma</text:p>
          </table:table-cell>
          <table:table-cell table:number-columns-repeated="3"/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3]&amp;&quot;,squadra:\&quot;&quot;&amp;CLASSIFICA!B3&amp;&quot;\&quot;&quot;&amp;&quot;,G:&quot;&amp;[$CLASSIFICA.C3]&amp;&quot;,V:&quot;&amp;[$CLASSIFICA.D3]&amp;&quot;,N:&quot;&amp;[$CLASSIFICA.E3]&amp;&quot;,P:&quot;&amp;[$CLASSIFICA.F3]&amp;&quot;,GF:&quot;&amp;[$CLASSIFICA.G3]&amp;&quot;,GS:&quot;&amp;[$CLASSIFICA.H3]&amp;&quot;,Dr:&quot;&amp;[$CLASSIFICA.I3]&amp;&quot;,Pt:&quot;&amp;[$CLASSIFICA.J3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16&amp;&quot;\&quot;&quot;&amp;&quot;,squadra:\&quot;&quot;&amp;CLASSIFICA!C16&amp;&quot;\&quot;&quot;&amp;&quot;,gol:&quot;&amp;[$CLASSIFICA.D16]&amp;&quot;,assist:&quot;&amp;[$CLASSIFICA.E16]&amp;&quot;,voto:&quot;&amp;[$CLASSIFICA.F16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INDEX(GIOCATORI!C$3:C$202,MATCH(LARGE(IF(GIOCATORI!I$3:I$202=&quot;portiere&quot;,GIOCATORI!G$3:G$202),1),IF(GIOCATORI!I$3:I$202=&quot;portiere&quot;,GIOCATORI!G$3:G$202),0))&amp;&quot;\&quot;&quot;&amp;&quot;,squadra:\&quot;&quot;&amp;INDEX(GIOCATORI!D$3:D$202,MATCH(LARGE(IF(GIOCATORI!I$3:I$202=&quot;portiere&quot;,GIOCATORI!G$3:G$202),1),IF(GIOCATORI!I$3:I$202=&quot;portiere&quot;,GIOCATORI!G$3:G$202),0))&amp;&quot;\&quot;&quot;&amp;&quot;,voto:&quot;&amp;LARGE(IF([$GIOCATORI.I$3:.I$202]=&quot;Portiere&quot;;[$GIOCATORI.G$3:.G$202]);1)&amp;&quot;}&quot;;&quot;&quot;)" office:value-type="string" office:string-value="" calcext:value-type="error">
            <text:p>Err:508</text:p>
          </table:table-cell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4]&amp;&quot;,squadra:\&quot;&quot;&amp;CLASSIFICA!B4&amp;&quot;\&quot;&quot;&amp;&quot;,G:&quot;&amp;[$CLASSIFICA.C4]&amp;&quot;,V:&quot;&amp;[$CLASSIFICA.D4]&amp;&quot;,N:&quot;&amp;[$CLASSIFICA.E4]&amp;&quot;,P:&quot;&amp;[$CLASSIFICA.F4]&amp;&quot;,GF:&quot;&amp;[$CLASSIFICA.G4]&amp;&quot;,GS:&quot;&amp;[$CLASSIFICA.H4]&amp;&quot;,Dr:&quot;&amp;[$CLASSIFICA.I4]&amp;&quot;,Pt:&quot;&amp;[$CLASSIFICA.J4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17&amp;&quot;\&quot;&quot;&amp;&quot;,squadra:\&quot;&quot;&amp;CLASSIFICA!C17&amp;&quot;\&quot;&quot;&amp;&quot;,gol:&quot;&amp;[$CLASSIFICA.D17]&amp;&quot;,assist:&quot;&amp;[$CLASSIFICA.E17]&amp;&quot;,voto:&quot;&amp;[$CLASSIFICA.F17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INDEX(GIOCATORI!C$3:C$202,MATCH(LARGE(IF(GIOCATORI!I$3:I$202=&quot;portiere&quot;,GIOCATORI!G$3:G$202),2),IF(GIOCATORI!I$3:I$202=&quot;portiere&quot;,GIOCATORI!G$3:G$202),0))&amp;&quot;\&quot;&quot;&amp;&quot;,squadra:\&quot;&quot;&amp;INDEX(GIOCATORI!D$3:D$202,MATCH(LARGE(IF(GIOCATORI!I$3:I$202=&quot;portiere&quot;,GIOCATORI!G$3:G$202),2),IF(GIOCATORI!I$3:I$202=&quot;portiere&quot;,GIOCATORI!G$3:G$202),0))&amp;&quot;\&quot;&quot;&amp;&quot;,voto:&quot;&amp;LARGE(IF([$GIOCATORI.I$3:.I$202]=&quot;Portiere&quot;;[$GIOCATORI.G$3:.G$202]);2)&amp;&quot;}&quot;;&quot;&quot;)" office:value-type="string" office:string-value="" calcext:value-type="error">
            <text:p>Err:508</text:p>
          </table:table-cell>
          <table:table-cell table:style-name="Default" table:number-columns-repeated="16379"/>
        </table:table-row>
        <table:table-row table:style-name="ro3">
          <table:table-cell/>
          <table:table-cell table:style-name="ce34" office:value-type="string" calcext:value-type="string">
            <text:p>JSON da copiare nel sito:</text:p>
          </table:table-cell>
          <table:table-cell table:formula="of:=IFERROR(&quot;{&quot;&amp;&quot;pos:&quot;&amp;[$CLASSIFICA.A5]&amp;&quot;,squadra:\&quot;&quot;&amp;CLASSIFICA!B5&amp;&quot;\&quot;&quot;&amp;&quot;,G:&quot;&amp;[$CLASSIFICA.C5]&amp;&quot;,V:&quot;&amp;[$CLASSIFICA.D5]&amp;&quot;,N:&quot;&amp;[$CLASSIFICA.E5]&amp;&quot;,P:&quot;&amp;[$CLASSIFICA.F5]&amp;&quot;,GF:&quot;&amp;[$CLASSIFICA.G5]&amp;&quot;,GS:&quot;&amp;[$CLASSIFICA.H5]&amp;&quot;,Dr:&quot;&amp;[$CLASSIFICA.I5]&amp;&quot;,Pt:&quot;&amp;[$CLASSIFICA.J5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18&amp;&quot;\&quot;&quot;&amp;&quot;,squadra:\&quot;&quot;&amp;CLASSIFICA!C18&amp;&quot;\&quot;&quot;&amp;&quot;,gol:&quot;&amp;[$CLASSIFICA.D18]&amp;&quot;,assist:&quot;&amp;[$CLASSIFICA.E18]&amp;&quot;,voto:&quot;&amp;[$CLASSIFICA.F18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INDEX(GIOCATORI!C$3:C$202,MATCH(LARGE(IF(GIOCATORI!I$3:I$202=&quot;portiere&quot;,GIOCATORI!G$3:G$202),3),IF(GIOCATORI!I$3:I$202=&quot;portiere&quot;,GIOCATORI!G$3:G$202),0))&amp;&quot;\&quot;&quot;&amp;&quot;,squadra:\&quot;&quot;&amp;INDEX(GIOCATORI!D$3:D$202,MATCH(LARGE(IF(GIOCATORI!I$3:I$202=&quot;portiere&quot;,GIOCATORI!G$3:G$202),3),IF(GIOCATORI!I$3:I$202=&quot;portiere&quot;,GIOCATORI!G$3:G$202),0))&amp;&quot;\&quot;&quot;&amp;&quot;,voto:&quot;&amp;LARGE(IF([$GIOCATORI.I$3:.I$202]=&quot;Portiere&quot;;[$GIOCATORI.G$3:.G$202]);3)&amp;&quot;}&quot;;&quot;&quot;)" office:value-type="string" office:string-value="" calcext:value-type="error">
            <text:p>Err:508</text:p>
          </table:table-cell>
          <table:table-cell table:style-name="Default" table:number-columns-repeated="16379"/>
        </table:table-row>
        <table:table-row table:style-name="ro10">
          <table:table-cell/>
          <table:table-cell table:style-name="ce35" table:formula="of:=&quot;{&quot;&quot;classifica&quot;&quot;:[&quot;&amp;textjoin(&quot;,&quot;;TRUE();[.C3:.C12])&amp;&quot;],&quot;&quot;cannonieri&quot;&quot;:[&quot;&amp;textjoin(&quot;,&quot;;TRUE();[.D3:.D12])&amp;&quot;],&quot;&quot;portieri&quot;&quot;:[&quot;&amp;textjoin(&quot;,&quot;;TRUE();[.E3:.E7])&amp;&quot;]}&quot;" office:value-type="string" office:string-value="" calcext:value-type="error">
            <text:p>#NOME?</text:p>
          </table:table-cell>
          <table:table-cell table:formula="of:=IFERROR(&quot;{&quot;&amp;&quot;pos:&quot;&amp;[$CLASSIFICA.A6]&amp;&quot;,squadra:\&quot;&quot;&amp;CLASSIFICA!B6&amp;&quot;\&quot;&quot;&amp;&quot;,G:&quot;&amp;[$CLASSIFICA.C6]&amp;&quot;,V:&quot;&amp;[$CLASSIFICA.D6]&amp;&quot;,N:&quot;&amp;[$CLASSIFICA.E6]&amp;&quot;,P:&quot;&amp;[$CLASSIFICA.F6]&amp;&quot;,GF:&quot;&amp;[$CLASSIFICA.G6]&amp;&quot;,GS:&quot;&amp;[$CLASSIFICA.H6]&amp;&quot;,Dr:&quot;&amp;[$CLASSIFICA.I6]&amp;&quot;,Pt:&quot;&amp;[$CLASSIFICA.J6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19&amp;&quot;\&quot;&quot;&amp;&quot;,squadra:\&quot;&quot;&amp;CLASSIFICA!C19&amp;&quot;\&quot;&quot;&amp;&quot;,gol:&quot;&amp;[$CLASSIFICA.D19]&amp;&quot;,assist:&quot;&amp;[$CLASSIFICA.E19]&amp;&quot;,voto:&quot;&amp;[$CLASSIFICA.F19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INDEX(GIOCATORI!C$3:C$202,MATCH(LARGE(IF(GIOCATORI!I$3:I$202=&quot;portiere&quot;,GIOCATORI!G$3:G$202),4),IF(GIOCATORI!I$3:I$202=&quot;portiere&quot;,GIOCATORI!G$3:G$202),0))&amp;&quot;\&quot;&quot;&amp;&quot;,squadra:\&quot;&quot;&amp;INDEX(GIOCATORI!D$3:D$202,MATCH(LARGE(IF(GIOCATORI!I$3:I$202=&quot;portiere&quot;,GIOCATORI!G$3:G$202),4),IF(GIOCATORI!I$3:I$202=&quot;portiere&quot;,GIOCATORI!G$3:G$202),0))&amp;&quot;\&quot;&quot;&amp;&quot;,voto:&quot;&amp;LARGE(IF([$GIOCATORI.I$3:.I$202]=&quot;Portiere&quot;;[$GIOCATORI.G$3:.G$202]);4)&amp;&quot;}&quot;;&quot;&quot;)" office:value-type="string" office:string-value="" calcext:value-type="error">
            <text:p>Err:508</text:p>
          </table:table-cell>
          <table:table-cell table:style-name="Default" table:number-columns-repeated="16379"/>
        </table:table-row>
        <table:table-row table:style-name="ro3">
          <table:table-cell/>
          <table:table-cell table:style-name="ce36" office:value-type="string" calcext:value-type="string">
            <text:p>↑ Seleziona B6, copia (Ctrl+C) e incolla nel campo JSON del sito Kairos Cup.</text:p>
          </table:table-cell>
          <table:table-cell table:formula="of:=IFERROR(&quot;{&quot;&amp;&quot;pos:&quot;&amp;[$CLASSIFICA.A7]&amp;&quot;,squadra:\&quot;&quot;&amp;CLASSIFICA!B7&amp;&quot;\&quot;&quot;&amp;&quot;,G:&quot;&amp;[$CLASSIFICA.C7]&amp;&quot;,V:&quot;&amp;[$CLASSIFICA.D7]&amp;&quot;,N:&quot;&amp;[$CLASSIFICA.E7]&amp;&quot;,P:&quot;&amp;[$CLASSIFICA.F7]&amp;&quot;,GF:&quot;&amp;[$CLASSIFICA.G7]&amp;&quot;,GS:&quot;&amp;[$CLASSIFICA.H7]&amp;&quot;,Dr:&quot;&amp;[$CLASSIFICA.I7]&amp;&quot;,Pt:&quot;&amp;[$CLASSIFICA.J7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0&amp;&quot;\&quot;&quot;&amp;&quot;,squadra:\&quot;&quot;&amp;CLASSIFICA!C20&amp;&quot;\&quot;&quot;&amp;&quot;,gol:&quot;&amp;[$CLASSIFICA.D20]&amp;&quot;,assist:&quot;&amp;[$CLASSIFICA.E20]&amp;&quot;,voto:&quot;&amp;[$CLASSIFICA.F20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INDEX(GIOCATORI!C$3:C$202,MATCH(LARGE(IF(GIOCATORI!I$3:I$202=&quot;portiere&quot;,GIOCATORI!G$3:G$202),5),IF(GIOCATORI!I$3:I$202=&quot;portiere&quot;,GIOCATORI!G$3:G$202),0))&amp;&quot;\&quot;&quot;&amp;&quot;,squadra:\&quot;&quot;&amp;INDEX(GIOCATORI!D$3:D$202,MATCH(LARGE(IF(GIOCATORI!I$3:I$202=&quot;portiere&quot;,GIOCATORI!G$3:G$202),5),IF(GIOCATORI!I$3:I$202=&quot;portiere&quot;,GIOCATORI!G$3:G$202),0))&amp;&quot;\&quot;&quot;&amp;&quot;,voto:&quot;&amp;LARGE(IF([$GIOCATORI.I$3:.I$202]=&quot;Portiere&quot;;[$GIOCATORI.G$3:.G$202]);5)&amp;&quot;}&quot;;&quot;&quot;)" office:value-type="string" office:string-value="" calcext:value-type="error">
            <text:p>Err:508</text:p>
          </table:table-cell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8]&amp;&quot;,squadra:\&quot;&quot;&amp;CLASSIFICA!B8&amp;&quot;\&quot;&quot;&amp;&quot;,G:&quot;&amp;[$CLASSIFICA.C8]&amp;&quot;,V:&quot;&amp;[$CLASSIFICA.D8]&amp;&quot;,N:&quot;&amp;[$CLASSIFICA.E8]&amp;&quot;,P:&quot;&amp;[$CLASSIFICA.F8]&amp;&quot;,GF:&quot;&amp;[$CLASSIFICA.G8]&amp;&quot;,GS:&quot;&amp;[$CLASSIFICA.H8]&amp;&quot;,Dr:&quot;&amp;[$CLASSIFICA.I8]&amp;&quot;,Pt:&quot;&amp;[$CLASSIFICA.J8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1&amp;&quot;\&quot;&quot;&amp;&quot;,squadra:\&quot;&quot;&amp;CLASSIFICA!C21&amp;&quot;\&quot;&quot;&amp;&quot;,gol:&quot;&amp;[$CLASSIFICA.D21]&amp;&quot;,assist:&quot;&amp;[$CLASSIFICA.E21]&amp;&quot;,voto:&quot;&amp;[$CLASSIFICA.F21]&amp;&quot;}&quot;;&quot;&quot;)" office:value-type="string" office:string-value="" calcext:value-type="error">
            <text:p>Err:508</text:p>
          </table:table-cell>
          <table:table-cell/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9]&amp;&quot;,squadra:\&quot;&quot;&amp;CLASSIFICA!B9&amp;&quot;\&quot;&quot;&amp;&quot;,G:&quot;&amp;[$CLASSIFICA.C9]&amp;&quot;,V:&quot;&amp;[$CLASSIFICA.D9]&amp;&quot;,N:&quot;&amp;[$CLASSIFICA.E9]&amp;&quot;,P:&quot;&amp;[$CLASSIFICA.F9]&amp;&quot;,GF:&quot;&amp;[$CLASSIFICA.G9]&amp;&quot;,GS:&quot;&amp;[$CLASSIFICA.H9]&amp;&quot;,Dr:&quot;&amp;[$CLASSIFICA.I9]&amp;&quot;,Pt:&quot;&amp;[$CLASSIFICA.J9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2&amp;&quot;\&quot;&quot;&amp;&quot;,squadra:\&quot;&quot;&amp;CLASSIFICA!C22&amp;&quot;\&quot;&quot;&amp;&quot;,gol:&quot;&amp;[$CLASSIFICA.D22]&amp;&quot;,assist:&quot;&amp;[$CLASSIFICA.E22]&amp;&quot;,voto:&quot;&amp;[$CLASSIFICA.F22]&amp;&quot;}&quot;;&quot;&quot;)" office:value-type="string" office:string-value="" calcext:value-type="error">
            <text:p>Err:508</text:p>
          </table:table-cell>
          <table:table-cell/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10]&amp;&quot;,squadra:\&quot;&quot;&amp;CLASSIFICA!B10&amp;&quot;\&quot;&quot;&amp;&quot;,G:&quot;&amp;[$CLASSIFICA.C10]&amp;&quot;,V:&quot;&amp;[$CLASSIFICA.D10]&amp;&quot;,N:&quot;&amp;[$CLASSIFICA.E10]&amp;&quot;,P:&quot;&amp;[$CLASSIFICA.F10]&amp;&quot;,GF:&quot;&amp;[$CLASSIFICA.G10]&amp;&quot;,GS:&quot;&amp;[$CLASSIFICA.H10]&amp;&quot;,Dr:&quot;&amp;[$CLASSIFICA.I10]&amp;&quot;,Pt:&quot;&amp;[$CLASSIFICA.J10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3&amp;&quot;\&quot;&quot;&amp;&quot;,squadra:\&quot;&quot;&amp;CLASSIFICA!C23&amp;&quot;\&quot;&quot;&amp;&quot;,gol:&quot;&amp;[$CLASSIFICA.D23]&amp;&quot;,assist:&quot;&amp;[$CLASSIFICA.E23]&amp;&quot;,voto:&quot;&amp;[$CLASSIFICA.F23]&amp;&quot;}&quot;;&quot;&quot;)" office:value-type="string" office:string-value="" calcext:value-type="error">
            <text:p>Err:508</text:p>
          </table:table-cell>
          <table:table-cell/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11]&amp;&quot;,squadra:\&quot;&quot;&amp;CLASSIFICA!B11&amp;&quot;\&quot;&quot;&amp;&quot;,G:&quot;&amp;[$CLASSIFICA.C11]&amp;&quot;,V:&quot;&amp;[$CLASSIFICA.D11]&amp;&quot;,N:&quot;&amp;[$CLASSIFICA.E11]&amp;&quot;,P:&quot;&amp;[$CLASSIFICA.F11]&amp;&quot;,GF:&quot;&amp;[$CLASSIFICA.G11]&amp;&quot;,GS:&quot;&amp;[$CLASSIFICA.H11]&amp;&quot;,Dr:&quot;&amp;[$CLASSIFICA.I11]&amp;&quot;,Pt:&quot;&amp;[$CLASSIFICA.J11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4&amp;&quot;\&quot;&quot;&amp;&quot;,squadra:\&quot;&quot;&amp;CLASSIFICA!C24&amp;&quot;\&quot;&quot;&amp;&quot;,gol:&quot;&amp;[$CLASSIFICA.D24]&amp;&quot;,assist:&quot;&amp;[$CLASSIFICA.E24]&amp;&quot;,voto:&quot;&amp;[$CLASSIFICA.F24]&amp;&quot;}&quot;;&quot;&quot;)" office:value-type="string" office:string-value="" calcext:value-type="error">
            <text:p>Err:508</text:p>
          </table:table-cell>
          <table:table-cell/>
          <table:table-cell table:style-name="Default" table:number-columns-repeated="16379"/>
        </table:table-row>
        <table:table-row table:style-name="ro3">
          <table:table-cell table:number-columns-repeated="2"/>
          <table:table-cell table:formula="of:=IFERROR(&quot;{&quot;&amp;&quot;pos:&quot;&amp;[$CLASSIFICA.A12]&amp;&quot;,squadra:\&quot;&quot;&amp;CLASSIFICA!B12&amp;&quot;\&quot;&quot;&amp;&quot;,G:&quot;&amp;[$CLASSIFICA.C12]&amp;&quot;,V:&quot;&amp;[$CLASSIFICA.D12]&amp;&quot;,N:&quot;&amp;[$CLASSIFICA.E12]&amp;&quot;,P:&quot;&amp;[$CLASSIFICA.F12]&amp;&quot;,GF:&quot;&amp;[$CLASSIFICA.G12]&amp;&quot;,GS:&quot;&amp;[$CLASSIFICA.H12]&amp;&quot;,Dr:&quot;&amp;[$CLASSIFICA.I12]&amp;&quot;,Pt:&quot;&amp;[$CLASSIFICA.J12]&amp;&quot;}&quot;;&quot;&quot;)" office:value-type="string" office:string-value="" calcext:value-type="error">
            <text:p>Err:508</text:p>
          </table:table-cell>
          <table:table-cell table:formula="of:=IFERROR(&quot;{&quot;&amp;&quot;nome:\&quot;&quot;&amp;CLASSIFICA!B25&amp;&quot;\&quot;&quot;&amp;&quot;,squadra:\&quot;&quot;&amp;CLASSIFICA!C25&amp;&quot;\&quot;&quot;&amp;&quot;,gol:&quot;&amp;[$CLASSIFICA.D25]&amp;&quot;,assist:&quot;&amp;[$CLASSIFICA.E25]&amp;&quot;,voto:&quot;&amp;[$CLASSIFICA.F25]&amp;&quot;}&quot;;&quot;&quot;)" office:value-type="string" office:string-value="" calcext:value-type="error">
            <text:p>Err:508</text:p>
          </table:table-cell>
          <table:table-cell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CALC" style:display-name="PageStyle__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FICA" style:display-name="PageStyle_CLASSIF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ITE" style:display-name="PageStyle_PARTI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IOCATORI" style:display-name="PageStyle_GIOCATO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JSON" style:display-name="PageStyle_EXPORT_J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4-27T19:50:52</meta:creation-date>
    <dc:date>2026-04-29T13:50:31.321810100</dc:date>
    <meta:generator>LibreOffice/25.8.4.2$Windows_X86_64 LibreOffice_project/290daaa01b999472f0c7a3890eb6a550fd74c6df</meta:generator>
    <meta:editing-duration>PT1M56S</meta:editing-duration>
    <meta:editing-cycles>1</meta:editing-cycles>
    <meta:document-statistic meta:table-count="6" meta:cell-count="828" meta:object-count="0"/>
    <meta:user-defined meta:name="AppVersion">3.1</meta:user-defined>
  </office:meta>
</office:document-meta>
</file>
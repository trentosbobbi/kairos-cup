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eader" style:family="table-cell" style:display-name="header">
      <style:text-properties fo:font-weight="bold" fo:font-size="10pt" fo:color="#FFFFFF"/>
      <style:paragraph-properties fo:text-align="center"/>
      <style:table-cell-properties fo:background-color="#1E3050" fo:border="0.05pt solid #444444" fo:wrap-option="wrap"/>
    </style:style>
    <style:style style:name="navy" style:family="table-cell" style:display-name="navy">
      <style:text-properties fo:font-weight="normal" fo:font-size="10pt" fo:color="#FFFFFF"/>
      <style:paragraph-properties fo:text-align="center"/>
      <style:table-cell-properties fo:background-color="#0B1628" fo:border="0.05pt solid #444444" fo:wrap-option="wrap"/>
    </style:style>
    <style:style style:name="title" style:family="table-cell" style:display-name="title">
      <style:text-properties fo:font-weight="bold" fo:font-size="14pt" fo:color="#C9A84C"/>
      <style:paragraph-properties fo:text-align="center"/>
      <style:table-cell-properties fo:background-color="#0B1628" fo:border="0.05pt solid #444444" fo:wrap-option="wrap"/>
    </style:style>
    <style:style style:name="section" style:family="table-cell" style:display-name="section">
      <style:text-properties fo:font-weight="bold" fo:font-size="11pt" fo:color="#0B1628"/>
      <style:paragraph-properties fo:text-align="center"/>
      <style:table-cell-properties fo:background-color="#C9A84C" fo:border="0.05pt solid #444444" fo:wrap-option="wrap"/>
    </style:style>
    <style:style style:name="yellow" style:family="table-cell" style:display-name="yellow">
      <style:text-properties fo:font-weight="bold" fo:font-size="12pt" fo:color="#C0392B"/>
      <style:paragraph-properties fo:text-align="center"/>
      <style:table-cell-properties fo:background-color="#FFFDE7" fo:border="0.05pt solid #444444" fo:wrap-option="wrap"/>
    </style:style>
    <style:style style:name="light" style:family="table-cell" style:display-name="light">
      <style:text-properties fo:font-weight="normal" fo:font-size="10pt" fo:color="#1A1A1A"/>
      <style:paragraph-properties fo:text-align="center"/>
      <style:table-cell-properties fo:background-color="#FFFDE7" fo:border="0.05pt solid #444444" fo:wrap-option="wrap"/>
    </style:style>
    <style:style style:name="gray" style:family="table-cell" style:display-name="gray">
      <style:text-properties fo:font-weight="normal" fo:font-size="10pt" fo:color="#1A1A1A"/>
      <style:paragraph-properties fo:text-align="center"/>
      <style:table-cell-properties fo:background-color="#F5F5F5" fo:border="0.05pt solid #444444" fo:wrap-option="wrap"/>
    </style:style>
    <style:style style:name="mid" style:family="table-cell" style:display-name="mid">
      <style:text-properties fo:font-weight="normal" fo:font-size="10pt" fo:color="#FFFFFF"/>
      <style:paragraph-properties fo:text-align="center"/>
      <style:table-cell-properties fo:background-color="#132038" fo:border="0.05pt solid #444444" fo:wrap-option="wrap"/>
    </style:style>
    <style:style style:name="warn" style:family="table-cell" style:display-name="warn">
      <style:text-properties fo:font-weight="bold" fo:font-size="10pt" fo:color="#C0392B"/>
      <style:paragraph-properties fo:text-align="center"/>
      <style:table-cell-properties fo:background-color="#FFF3E0" fo:border="0.05pt solid #444444" fo:wrap-option="wrap"/>
    </style:style>
    <style:style style:name="cream" style:family="table-cell" style:display-name="cream">
      <style:text-properties fo:font-weight="normal" fo:font-size="10pt" fo:color="#F5EDD8"/>
      <style:paragraph-properties fo:text-align="left"/>
      <style:table-cell-properties fo:background-color="#0B1628" fo:border="0.05pt solid #444444" fo:wrap-option="wrap"/>
    </style:style>
    <style:style style:name="gold_l" style:family="table-cell" style:display-name="gold_l">
      <style:text-properties fo:font-weight="bold" fo:font-size="12pt" fo:color="#E8C96A"/>
      <style:paragraph-properties fo:text-align="left"/>
      <style:table-cell-properties fo:background-color="#0B1628" fo:border="0.05pt solid #444444" fo:wrap-option="wrap"/>
    </style:style>
  </office:automatic-styles>
  <office:body>
    <office:spreadsheet>
      <table:table table:name="ISTRUZIONI">
        <table:table-row>
          <table:table-cell/>
          <table:table-cell office:value-type="string" table:style-name="title">
            <text:p>KAIROS CUP 2025 — Gestione Torneo</text:p>
          </table:table-cell>
        </table:table-row>
        <table:table-row>
          <table:table-cell/>
          <table:table-cell office:value-type="string" table:style-name="cream">
            <text:p>Campo Giarizzole · Trieste · Calcio a 7 · 10 squadre</text:p>
          </table:table-cell>
        </table:table-row>
        <table:table-row>
          <table:table-cell/>
          <table:table-cell/>
        </table:table-row>
        <table:table-row>
          <table:table-cell/>
          <table:table-cell office:value-type="string" table:style-name="gold_l">
            <text:p>COME USARE QUESTO FILE:</text:p>
          </table:table-cell>
        </table:table-row>
        <table:table-row>
          <table:table-cell/>
          <table:table-cell office:value-type="string" table:style-name="cream">
            <text:p>1. Foglio PARTITE → inserisci i gol (celle gialle) per ogni partita giocata.</text:p>
          </table:table-cell>
        </table:table-row>
        <table:table-row>
          <table:table-cell/>
          <table:table-cell office:value-type="string" table:style-name="cream">
            <text:p>2. Foglio GIOCATORI → inserisci nome, squadra, gol, assist, voto, presenze, ruolo.</text:p>
          </table:table-cell>
        </table:table-row>
        <table:table-row>
          <table:table-cell/>
          <table:table-cell office:value-type="string" table:style-name="cream">
            <text:p>3. Foglio CLASSIFICA → si aggiorna quando esegui build.py (non modificare).</text:p>
          </table:table-cell>
        </table:table-row>
        <table:table-row>
          <table:table-cell/>
          <table:table-cell office:value-type="string" table:style-name="cream">
            <text:p>4. Per aggiornare il sito: salva il file e caricalo su GitHub.</text:p>
          </table:table-cell>
        </table:table-row>
        <table:table-row>
          <table:table-cell/>
          <table:table-cell/>
        </table:table-row>
        <table:table-row>
          <table:table-cell/>
          <table:table-cell office:value-type="string" table:style-name="gold_l">
            <text:p>FORMATO TORNEO:</text:p>
          </table:table-cell>
        </table:table-row>
        <table:table-row>
          <table:table-cell/>
          <table:table-cell office:value-type="string" table:style-name="cream">
            <text:p>Fase 1 — Campionato avulso: tutti contro tutti (45 partite, 9 giornate da 5).</text:p>
          </table:table-cell>
        </table:table-row>
        <table:table-row>
          <table:table-cell/>
          <table:table-cell office:value-type="string" table:style-name="cream">
            <text:p>Fase 2 — Finali per posizione: 1°vs2°, 3°vs4°, 5°vs6°, 7°vs8°, 9°vs10°.</text:p>
          </table:table-cell>
        </table:table-row>
        <table:table-row>
          <table:table-cell/>
          <table:table-cell office:value-type="string" table:style-name="cream">
            <text:p>Punti: Vittoria=3 | Pareggio=1 | Sconfitta=0</text:p>
          </table:table-cell>
        </table:table-row>
        <table:table-row>
          <table:table-cell/>
          <table:table-cell/>
        </table:table-row>
        <table:table-row>
          <table:table-cell/>
          <table:table-cell office:value-type="string" table:style-name="warn">
            <text:p>⚠  Inserisci SOLO i valori nelle celle gialle — non toccare le altre.</text:p>
          </table:table-cell>
        </table:table-row>
      </table:table>
      <table:table table:name="PARTITE">
        <table:table-row>
          <table:table-cell office:value-type="string" table:style-name="title">
            <text:p>KAIROS CUP 2025 — RISULTATI PARTITE</text:p>
          </table:table-cell>
        </table:table-row>
        <table:table-row>
          <table:table-cell office:value-type="string" table:style-name="section">
            <text:p>◆  FASE 1 — CAMPIONATO AVULSO  ◆</text:p>
          </table:table-cell>
        </table:table-row>
        <table:table-row>
          <table:table-cell office:value-type="string" table:style-name="header">
            <text:p>#</text:p>
          </table:table-cell>
          <table:table-cell office:value-type="string" table:style-name="header">
            <text:p>Giornata</text:p>
          </table:table-cell>
          <table:table-cell office:value-type="string" table:style-name="header">
            <text:p>Squadra A</text:p>
          </table:table-cell>
          <table:table-cell office:value-type="string" table:style-name="header">
            <text:p>Gol A</text:p>
          </table:table-cell>
          <table:table-cell office:value-type="string" table:style-name="header">
            <text:p>VS</text:p>
          </table:table-cell>
          <table:table-cell office:value-type="string" table:style-name="header">
            <text:p>Gol B</text:p>
          </table:table-cell>
          <table:table-cell office:value-type="string" table:style-name="header">
            <text:p>Squadra B</text:p>
          </table:table-cell>
          <table:table-cell office:value-type="string" table:style-name="header">
            <text:p>Data</text:p>
          </table:table-cell>
          <table:table-cell office:value-type="string" table:style-name="header">
            <text:p>Note</text:p>
          </table:table-cell>
        </table:table-row>
        <table:table-row>
          <table:table-cell office:value-type="float" table:style-name="navy" office:value="1">
            <text:p>1</text:p>
          </table:table-cell>
          <table:table-cell office:value-type="string" table:style-name="navy">
            <text:p>G1</text:p>
          </table:table-cell>
          <table:table-cell office:value-type="string" table:style-name="navy">
            <text:p>Torino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orino 2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2">
            <text:p>2</text:p>
          </table:table-cell>
          <table:table-cell office:value-type="string" table:style-name="mid">
            <text:p>G1</text:p>
          </table:table-cell>
          <table:table-cell office:value-type="string" table:style-name="mid">
            <text:p>Mestre 1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Trieste 1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3">
            <text:p>3</text:p>
          </table:table-cell>
          <table:table-cell office:value-type="string" table:style-name="navy">
            <text:p>G1</text:p>
          </table:table-cell>
          <table:table-cell office:value-type="string" table:style-name="navy">
            <text:p>Venezia/Mestre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Udin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4">
            <text:p>4</text:p>
          </table:table-cell>
          <table:table-cell office:value-type="string" table:style-name="mid">
            <text:p>G1</text:p>
          </table:table-cell>
          <table:table-cell office:value-type="string" table:style-name="mid">
            <text:p>Merano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San Giorgio di Nogaro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5">
            <text:p>5</text:p>
          </table:table-cell>
          <table:table-cell office:value-type="string" table:style-name="navy">
            <text:p>G1</text:p>
          </table:table-cell>
          <table:table-cell office:value-type="string" table:style-name="navy">
            <text:p>Pordenone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Pordenon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6">
            <text:p>6</text:p>
          </table:table-cell>
          <table:table-cell office:value-type="string" table:style-name="mid">
            <text:p>G2</text:p>
          </table:table-cell>
          <table:table-cell office:value-type="string" table:style-name="mid">
            <text:p>Torino 1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Trieste 2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7">
            <text:p>7</text:p>
          </table:table-cell>
          <table:table-cell office:value-type="string" table:style-name="navy">
            <text:p>G2</text:p>
          </table:table-cell>
          <table:table-cell office:value-type="string" table:style-name="navy">
            <text:p>Torino 2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Udin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8">
            <text:p>8</text:p>
          </table:table-cell>
          <table:table-cell office:value-type="string" table:style-name="mid">
            <text:p>G2</text:p>
          </table:table-cell>
          <table:table-cell office:value-type="string" table:style-name="mid">
            <text:p>Mestre 1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San Giorgio di Nogaro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9">
            <text:p>9</text:p>
          </table:table-cell>
          <table:table-cell office:value-type="string" table:style-name="navy">
            <text:p>G2</text:p>
          </table:table-cell>
          <table:table-cell office:value-type="string" table:style-name="navy">
            <text:p>Venezia/Mestre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Pordenon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10">
            <text:p>10</text:p>
          </table:table-cell>
          <table:table-cell office:value-type="string" table:style-name="mid">
            <text:p>G2</text:p>
          </table:table-cell>
          <table:table-cell office:value-type="string" table:style-name="mid">
            <text:p>Merano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Merano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11">
            <text:p>11</text:p>
          </table:table-cell>
          <table:table-cell office:value-type="string" table:style-name="navy">
            <text:p>G3</text:p>
          </table:table-cell>
          <table:table-cell office:value-type="string" table:style-name="navy">
            <text:p>Torino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rieste 1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12">
            <text:p>12</text:p>
          </table:table-cell>
          <table:table-cell office:value-type="string" table:style-name="mid">
            <text:p>G3</text:p>
          </table:table-cell>
          <table:table-cell office:value-type="string" table:style-name="mid">
            <text:p>Trieste 2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San Giorgio di Nogaro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13">
            <text:p>13</text:p>
          </table:table-cell>
          <table:table-cell office:value-type="string" table:style-name="navy">
            <text:p>G3</text:p>
          </table:table-cell>
          <table:table-cell office:value-type="string" table:style-name="navy">
            <text:p>Torino 2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Pordenon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14">
            <text:p>14</text:p>
          </table:table-cell>
          <table:table-cell office:value-type="string" table:style-name="mid">
            <text:p>G3</text:p>
          </table:table-cell>
          <table:table-cell office:value-type="string" table:style-name="mid">
            <text:p>Mestre 1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Merano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15">
            <text:p>15</text:p>
          </table:table-cell>
          <table:table-cell office:value-type="string" table:style-name="navy">
            <text:p>G3</text:p>
          </table:table-cell>
          <table:table-cell office:value-type="string" table:style-name="navy">
            <text:p>Venezia/Mestre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Venezia/Mestr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16">
            <text:p>16</text:p>
          </table:table-cell>
          <table:table-cell office:value-type="string" table:style-name="mid">
            <text:p>G4</text:p>
          </table:table-cell>
          <table:table-cell office:value-type="string" table:style-name="mid">
            <text:p>Torino 1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Udine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17">
            <text:p>17</text:p>
          </table:table-cell>
          <table:table-cell office:value-type="string" table:style-name="navy">
            <text:p>G4</text:p>
          </table:table-cell>
          <table:table-cell office:value-type="string" table:style-name="navy">
            <text:p>Trieste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Pordenon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18">
            <text:p>18</text:p>
          </table:table-cell>
          <table:table-cell office:value-type="string" table:style-name="mid">
            <text:p>G4</text:p>
          </table:table-cell>
          <table:table-cell office:value-type="string" table:style-name="mid">
            <text:p>Trieste 2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Merano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19">
            <text:p>19</text:p>
          </table:table-cell>
          <table:table-cell office:value-type="string" table:style-name="navy">
            <text:p>G4</text:p>
          </table:table-cell>
          <table:table-cell office:value-type="string" table:style-name="navy">
            <text:p>Torino 2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Venezia/Mestr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20">
            <text:p>20</text:p>
          </table:table-cell>
          <table:table-cell office:value-type="string" table:style-name="mid">
            <text:p>G4</text:p>
          </table:table-cell>
          <table:table-cell office:value-type="string" table:style-name="mid">
            <text:p>Mestre 1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Mestre 1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21">
            <text:p>21</text:p>
          </table:table-cell>
          <table:table-cell office:value-type="string" table:style-name="navy">
            <text:p>G5</text:p>
          </table:table-cell>
          <table:table-cell office:value-type="string" table:style-name="navy">
            <text:p>Torino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San Giorgio di Nogaro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22">
            <text:p>22</text:p>
          </table:table-cell>
          <table:table-cell office:value-type="string" table:style-name="mid">
            <text:p>G5</text:p>
          </table:table-cell>
          <table:table-cell office:value-type="string" table:style-name="mid">
            <text:p>Udine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Merano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23">
            <text:p>23</text:p>
          </table:table-cell>
          <table:table-cell office:value-type="string" table:style-name="navy">
            <text:p>G5</text:p>
          </table:table-cell>
          <table:table-cell office:value-type="string" table:style-name="navy">
            <text:p>Trieste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Venezia/Mestr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24">
            <text:p>24</text:p>
          </table:table-cell>
          <table:table-cell office:value-type="string" table:style-name="mid">
            <text:p>G5</text:p>
          </table:table-cell>
          <table:table-cell office:value-type="string" table:style-name="mid">
            <text:p>Trieste 2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Mestre 1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25">
            <text:p>25</text:p>
          </table:table-cell>
          <table:table-cell office:value-type="string" table:style-name="navy">
            <text:p>G5</text:p>
          </table:table-cell>
          <table:table-cell office:value-type="string" table:style-name="navy">
            <text:p>Torino 2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orino 2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26">
            <text:p>26</text:p>
          </table:table-cell>
          <table:table-cell office:value-type="string" table:style-name="mid">
            <text:p>G6</text:p>
          </table:table-cell>
          <table:table-cell office:value-type="string" table:style-name="mid">
            <text:p>Torino 1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Pordenone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27">
            <text:p>27</text:p>
          </table:table-cell>
          <table:table-cell office:value-type="string" table:style-name="navy">
            <text:p>G6</text:p>
          </table:table-cell>
          <table:table-cell office:value-type="string" table:style-name="navy">
            <text:p>San Giorgio di Nogaro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Venezia/Mestre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28">
            <text:p>28</text:p>
          </table:table-cell>
          <table:table-cell office:value-type="string" table:style-name="mid">
            <text:p>G6</text:p>
          </table:table-cell>
          <table:table-cell office:value-type="string" table:style-name="mid">
            <text:p>Udine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Mestre 1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29">
            <text:p>29</text:p>
          </table:table-cell>
          <table:table-cell office:value-type="string" table:style-name="navy">
            <text:p>G6</text:p>
          </table:table-cell>
          <table:table-cell office:value-type="string" table:style-name="navy">
            <text:p>Trieste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orino 2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30">
            <text:p>30</text:p>
          </table:table-cell>
          <table:table-cell office:value-type="string" table:style-name="mid">
            <text:p>G6</text:p>
          </table:table-cell>
          <table:table-cell office:value-type="string" table:style-name="mid">
            <text:p>Trieste 2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Trieste 2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31">
            <text:p>31</text:p>
          </table:table-cell>
          <table:table-cell office:value-type="string" table:style-name="navy">
            <text:p>G7</text:p>
          </table:table-cell>
          <table:table-cell office:value-type="string" table:style-name="navy">
            <text:p>Torino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Merano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32">
            <text:p>32</text:p>
          </table:table-cell>
          <table:table-cell office:value-type="string" table:style-name="mid">
            <text:p>G7</text:p>
          </table:table-cell>
          <table:table-cell office:value-type="string" table:style-name="mid">
            <text:p>Pordenone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Mestre 1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33">
            <text:p>33</text:p>
          </table:table-cell>
          <table:table-cell office:value-type="string" table:style-name="navy">
            <text:p>G7</text:p>
          </table:table-cell>
          <table:table-cell office:value-type="string" table:style-name="navy">
            <text:p>San Giorgio di Nogaro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orino 2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34">
            <text:p>34</text:p>
          </table:table-cell>
          <table:table-cell office:value-type="string" table:style-name="mid">
            <text:p>G7</text:p>
          </table:table-cell>
          <table:table-cell office:value-type="string" table:style-name="mid">
            <text:p>Udine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Trieste 2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35">
            <text:p>35</text:p>
          </table:table-cell>
          <table:table-cell office:value-type="string" table:style-name="navy">
            <text:p>G7</text:p>
          </table:table-cell>
          <table:table-cell office:value-type="string" table:style-name="navy">
            <text:p>Trieste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rieste 1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36">
            <text:p>36</text:p>
          </table:table-cell>
          <table:table-cell office:value-type="string" table:style-name="mid">
            <text:p>G8</text:p>
          </table:table-cell>
          <table:table-cell office:value-type="string" table:style-name="mid">
            <text:p>Torino 1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Venezia/Mestre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37">
            <text:p>37</text:p>
          </table:table-cell>
          <table:table-cell office:value-type="string" table:style-name="navy">
            <text:p>G8</text:p>
          </table:table-cell>
          <table:table-cell office:value-type="string" table:style-name="navy">
            <text:p>Merano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orino 2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38">
            <text:p>38</text:p>
          </table:table-cell>
          <table:table-cell office:value-type="string" table:style-name="mid">
            <text:p>G8</text:p>
          </table:table-cell>
          <table:table-cell office:value-type="string" table:style-name="mid">
            <text:p>Pordenone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Trieste 2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39">
            <text:p>39</text:p>
          </table:table-cell>
          <table:table-cell office:value-type="string" table:style-name="navy">
            <text:p>G8</text:p>
          </table:table-cell>
          <table:table-cell office:value-type="string" table:style-name="navy">
            <text:p>San Giorgio di Nogaro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rieste 1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40">
            <text:p>40</text:p>
          </table:table-cell>
          <table:table-cell office:value-type="string" table:style-name="mid">
            <text:p>G8</text:p>
          </table:table-cell>
          <table:table-cell office:value-type="string" table:style-name="mid">
            <text:p>Udine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Udine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41">
            <text:p>41</text:p>
          </table:table-cell>
          <table:table-cell office:value-type="string" table:style-name="navy">
            <text:p>G9</text:p>
          </table:table-cell>
          <table:table-cell office:value-type="string" table:style-name="navy">
            <text:p>Torino 1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Mestre 1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42">
            <text:p>42</text:p>
          </table:table-cell>
          <table:table-cell office:value-type="string" table:style-name="mid">
            <text:p>G9</text:p>
          </table:table-cell>
          <table:table-cell office:value-type="string" table:style-name="mid">
            <text:p>Venezia/Mestre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Trieste 2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43">
            <text:p>43</text:p>
          </table:table-cell>
          <table:table-cell office:value-type="string" table:style-name="navy">
            <text:p>G9</text:p>
          </table:table-cell>
          <table:table-cell office:value-type="string" table:style-name="navy">
            <text:p>Merano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rieste 1</text:p>
          </table:table-cell>
          <table:table-cell table:style-name="gray"/>
          <table:table-cell table:style-name="gray"/>
        </table:table-row>
        <table:table-row>
          <table:table-cell office:value-type="float" table:style-name="mid" office:value="44">
            <text:p>44</text:p>
          </table:table-cell>
          <table:table-cell office:value-type="string" table:style-name="mid">
            <text:p>G9</text:p>
          </table:table-cell>
          <table:table-cell office:value-type="string" table:style-name="mid">
            <text:p>Pordenone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Udine</text:p>
          </table:table-cell>
          <table:table-cell table:style-name="gray"/>
          <table:table-cell table:style-name="gray"/>
        </table:table-row>
        <table:table-row>
          <table:table-cell office:value-type="float" table:style-name="navy" office:value="45">
            <text:p>45</text:p>
          </table:table-cell>
          <table:table-cell office:value-type="string" table:style-name="navy">
            <text:p>G9</text:p>
          </table:table-cell>
          <table:table-cell office:value-type="string" table:style-name="navy">
            <text:p>San Giorgio di Nogaro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San Giorgio di Nogaro</text:p>
          </table:table-cell>
          <table:table-cell table:style-name="gray"/>
          <table:table-cell table:style-name="gray"/>
        </table:table-row>
        <table:table-row>
          <table:table-cell office:value-type="string" table:style-name="section">
            <text:p>◆  FASE 2 — FINALI PER POSIZIONE  ◆</text:p>
          </table:table-cell>
        </table:table-row>
        <table:table-row>
          <table:table-cell office:value-type="string" table:style-name="header">
            <text:p>#</text:p>
          </table:table-cell>
          <table:table-cell office:value-type="string" table:style-name="header">
            <text:p>Giornata</text:p>
          </table:table-cell>
          <table:table-cell office:value-type="string" table:style-name="header">
            <text:p>Squadra A</text:p>
          </table:table-cell>
          <table:table-cell office:value-type="string" table:style-name="header">
            <text:p>Gol A</text:p>
          </table:table-cell>
          <table:table-cell office:value-type="string" table:style-name="header">
            <text:p>VS</text:p>
          </table:table-cell>
          <table:table-cell office:value-type="string" table:style-name="header">
            <text:p>Gol B</text:p>
          </table:table-cell>
          <table:table-cell office:value-type="string" table:style-name="header">
            <text:p>Squadra B</text:p>
          </table:table-cell>
          <table:table-cell office:value-type="string" table:style-name="header">
            <text:p>Data</text:p>
          </table:table-cell>
          <table:table-cell office:value-type="string" table:style-name="header">
            <text:p>Note</text:p>
          </table:table-cell>
        </table:table-row>
        <table:table-row>
          <table:table-cell office:value-type="float" table:style-name="navy" office:value="1">
            <text:p>1</text:p>
          </table:table-cell>
          <table:table-cell office:value-type="string" table:style-name="navy">
            <text:p>FIN</text:p>
          </table:table-cell>
          <table:table-cell office:value-type="string" table:style-name="navy">
            <text:p>TBD (dalla classifica)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BD (dalla classifica)</text:p>
          </table:table-cell>
          <table:table-cell office:value-type="string" table:style-name="gray">
            <text:p>Finale 1°/2°</text:p>
          </table:table-cell>
          <table:table-cell table:style-name="gray"/>
        </table:table-row>
        <table:table-row>
          <table:table-cell office:value-type="float" table:style-name="mid" office:value="2">
            <text:p>2</text:p>
          </table:table-cell>
          <table:table-cell office:value-type="string" table:style-name="mid">
            <text:p>FIN</text:p>
          </table:table-cell>
          <table:table-cell office:value-type="string" table:style-name="mid">
            <text:p>TBD (dalla classifica)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TBD (dalla classifica)</text:p>
          </table:table-cell>
          <table:table-cell office:value-type="string" table:style-name="gray">
            <text:p>Finale 3°/4°</text:p>
          </table:table-cell>
          <table:table-cell table:style-name="gray"/>
        </table:table-row>
        <table:table-row>
          <table:table-cell office:value-type="float" table:style-name="navy" office:value="3">
            <text:p>3</text:p>
          </table:table-cell>
          <table:table-cell office:value-type="string" table:style-name="navy">
            <text:p>FIN</text:p>
          </table:table-cell>
          <table:table-cell office:value-type="string" table:style-name="navy">
            <text:p>TBD (dalla classifica)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BD (dalla classifica)</text:p>
          </table:table-cell>
          <table:table-cell office:value-type="string" table:style-name="gray">
            <text:p>Finale 5°/6°</text:p>
          </table:table-cell>
          <table:table-cell table:style-name="gray"/>
        </table:table-row>
        <table:table-row>
          <table:table-cell office:value-type="float" table:style-name="mid" office:value="4">
            <text:p>4</text:p>
          </table:table-cell>
          <table:table-cell office:value-type="string" table:style-name="mid">
            <text:p>FIN</text:p>
          </table:table-cell>
          <table:table-cell office:value-type="string" table:style-name="mid">
            <text:p>TBD (dalla classifica)</text:p>
          </table:table-cell>
          <table:table-cell table:style-name="yellow"/>
          <table:table-cell office:value-type="string" table:style-name="mid">
            <text:p>VS</text:p>
          </table:table-cell>
          <table:table-cell table:style-name="yellow"/>
          <table:table-cell office:value-type="string" table:style-name="mid">
            <text:p>TBD (dalla classifica)</text:p>
          </table:table-cell>
          <table:table-cell office:value-type="string" table:style-name="gray">
            <text:p>Finale 7°/8°</text:p>
          </table:table-cell>
          <table:table-cell table:style-name="gray"/>
        </table:table-row>
        <table:table-row>
          <table:table-cell office:value-type="float" table:style-name="navy" office:value="5">
            <text:p>5</text:p>
          </table:table-cell>
          <table:table-cell office:value-type="string" table:style-name="navy">
            <text:p>FIN</text:p>
          </table:table-cell>
          <table:table-cell office:value-type="string" table:style-name="navy">
            <text:p>TBD (dalla classifica)</text:p>
          </table:table-cell>
          <table:table-cell table:style-name="yellow"/>
          <table:table-cell office:value-type="string" table:style-name="navy">
            <text:p>VS</text:p>
          </table:table-cell>
          <table:table-cell table:style-name="yellow"/>
          <table:table-cell office:value-type="string" table:style-name="navy">
            <text:p>TBD (dalla classifica)</text:p>
          </table:table-cell>
          <table:table-cell office:value-type="string" table:style-name="gray">
            <text:p>Finale 9°/10°</text:p>
          </table:table-cell>
          <table:table-cell table:style-name="gray"/>
        </table:table-row>
      </table:table>
      <table:table table:name="GIOCATORI">
        <table:table-row>
          <table:table-cell office:value-type="string" table:style-name="title">
            <text:p>KAIROS CUP 2025 — DATI GIOCATORI</text:p>
          </table:table-cell>
        </table:table-row>
        <table:table-row>
          <table:table-cell office:value-type="string" table:style-name="header">
            <text:p>#</text:p>
          </table:table-cell>
          <table:table-cell office:value-type="string" table:style-name="header">
            <text:p>N°</text:p>
          </table:table-cell>
          <table:table-cell office:value-type="string" table:style-name="header">
            <text:p>Cognome e Nome</text:p>
          </table:table-cell>
          <table:table-cell office:value-type="string" table:style-name="header">
            <text:p>Squadra</text:p>
          </table:table-cell>
          <table:table-cell office:value-type="string" table:style-name="header">
            <text:p>Gol</text:p>
          </table:table-cell>
          <table:table-cell office:value-type="string" table:style-name="header">
            <text:p>Assist</text:p>
          </table:table-cell>
          <table:table-cell office:value-type="string" table:style-name="header">
            <text:p>Voto (1-10)</text:p>
          </table:table-cell>
          <table:table-cell office:value-type="string" table:style-name="header">
            <text:p>Presenze</text:p>
          </table:table-cell>
          <table:table-cell office:value-type="string" table:style-name="header">
            <text:p>Ruolo</text:p>
          </table:table-cell>
        </table:table-row>
        <table:table-row>
          <table:table-cell office:value-type="float" table:style-name="navy" office:value="1">
            <text:p>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2">
            <text:p>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3">
            <text:p>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4">
            <text:p>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5">
            <text:p>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6">
            <text:p>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7">
            <text:p>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8">
            <text:p>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9">
            <text:p>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0">
            <text:p>1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1">
            <text:p>1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2">
            <text:p>1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3">
            <text:p>1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4">
            <text:p>1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5">
            <text:p>1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6">
            <text:p>1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7">
            <text:p>1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8">
            <text:p>1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9">
            <text:p>1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20">
            <text:p>2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21">
            <text:p>2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22">
            <text:p>2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23">
            <text:p>2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24">
            <text:p>2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25">
            <text:p>2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26">
            <text:p>2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27">
            <text:p>2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28">
            <text:p>2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29">
            <text:p>2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30">
            <text:p>3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31">
            <text:p>3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32">
            <text:p>3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33">
            <text:p>3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34">
            <text:p>3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35">
            <text:p>3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36">
            <text:p>3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37">
            <text:p>3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38">
            <text:p>3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39">
            <text:p>3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40">
            <text:p>4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41">
            <text:p>4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42">
            <text:p>4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43">
            <text:p>4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44">
            <text:p>4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45">
            <text:p>4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46">
            <text:p>4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47">
            <text:p>4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48">
            <text:p>4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49">
            <text:p>4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50">
            <text:p>5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51">
            <text:p>5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52">
            <text:p>5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53">
            <text:p>5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54">
            <text:p>5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55">
            <text:p>5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56">
            <text:p>5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57">
            <text:p>5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58">
            <text:p>5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59">
            <text:p>5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60">
            <text:p>6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61">
            <text:p>6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62">
            <text:p>6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63">
            <text:p>6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64">
            <text:p>6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65">
            <text:p>6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66">
            <text:p>6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67">
            <text:p>6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68">
            <text:p>6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69">
            <text:p>6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70">
            <text:p>7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71">
            <text:p>7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72">
            <text:p>7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73">
            <text:p>7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74">
            <text:p>7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75">
            <text:p>7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76">
            <text:p>7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77">
            <text:p>7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78">
            <text:p>7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79">
            <text:p>7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80">
            <text:p>8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81">
            <text:p>8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82">
            <text:p>8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83">
            <text:p>8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84">
            <text:p>8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85">
            <text:p>8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86">
            <text:p>8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87">
            <text:p>8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88">
            <text:p>8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89">
            <text:p>8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90">
            <text:p>9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91">
            <text:p>9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92">
            <text:p>9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93">
            <text:p>9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94">
            <text:p>9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95">
            <text:p>9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96">
            <text:p>9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97">
            <text:p>9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98">
            <text:p>9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99">
            <text:p>9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00">
            <text:p>10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01">
            <text:p>10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02">
            <text:p>10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03">
            <text:p>10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04">
            <text:p>10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05">
            <text:p>10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06">
            <text:p>10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07">
            <text:p>10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08">
            <text:p>10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09">
            <text:p>10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10">
            <text:p>11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11">
            <text:p>11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12">
            <text:p>11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13">
            <text:p>11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14">
            <text:p>11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15">
            <text:p>11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16">
            <text:p>11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17">
            <text:p>11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18">
            <text:p>11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19">
            <text:p>11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20">
            <text:p>12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21">
            <text:p>12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22">
            <text:p>12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23">
            <text:p>12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24">
            <text:p>12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25">
            <text:p>12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26">
            <text:p>12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27">
            <text:p>12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28">
            <text:p>12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29">
            <text:p>12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30">
            <text:p>13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31">
            <text:p>13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32">
            <text:p>13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33">
            <text:p>13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34">
            <text:p>13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35">
            <text:p>13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36">
            <text:p>13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37">
            <text:p>13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38">
            <text:p>13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39">
            <text:p>13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40">
            <text:p>14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41">
            <text:p>14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42">
            <text:p>14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43">
            <text:p>14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44">
            <text:p>14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45">
            <text:p>14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46">
            <text:p>14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47">
            <text:p>14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48">
            <text:p>14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49">
            <text:p>14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50">
            <text:p>15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51">
            <text:p>15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52">
            <text:p>15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53">
            <text:p>15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54">
            <text:p>15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55">
            <text:p>15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56">
            <text:p>15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57">
            <text:p>15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58">
            <text:p>15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59">
            <text:p>15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60">
            <text:p>16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61">
            <text:p>16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62">
            <text:p>16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63">
            <text:p>16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64">
            <text:p>16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65">
            <text:p>16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66">
            <text:p>16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67">
            <text:p>16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68">
            <text:p>16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69">
            <text:p>16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70">
            <text:p>17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71">
            <text:p>17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72">
            <text:p>17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73">
            <text:p>17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74">
            <text:p>17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75">
            <text:p>17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76">
            <text:p>17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77">
            <text:p>17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78">
            <text:p>17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79">
            <text:p>17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80">
            <text:p>18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81">
            <text:p>18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82">
            <text:p>18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83">
            <text:p>18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84">
            <text:p>18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85">
            <text:p>18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86">
            <text:p>18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87">
            <text:p>18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88">
            <text:p>18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89">
            <text:p>18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90">
            <text:p>19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91">
            <text:p>191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92">
            <text:p>192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93">
            <text:p>193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94">
            <text:p>194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95">
            <text:p>195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96">
            <text:p>196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97">
            <text:p>197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198">
            <text:p>198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navy" office:value="199">
            <text:p>199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  <table:table-row>
          <table:table-cell office:value-type="float" table:style-name="mid" office:value="200">
            <text:p>200</text:p>
          </table:table-cell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  <table:table-cell table:style-name="light"/>
        </table:table-row>
      </table:table>
      <table:table table:name="CLASSIFICA">
        <table:table-row>
          <table:table-cell office:value-type="string" table:style-name="title">
            <text:p>KAIROS CUP 2025 — CLASSIFICA (generata da build.py)</text:p>
          </table:table-cell>
        </table:table-row>
        <table:table-row>
          <table:table-cell office:value-type="string" table:style-name="header">
            <text:p>Pos</text:p>
          </table:table-cell>
          <table:table-cell office:value-type="string" table:style-name="header">
            <text:p>Squadra</text:p>
          </table:table-cell>
          <table:table-cell office:value-type="string" table:style-name="header">
            <text:p>G</text:p>
          </table:table-cell>
          <table:table-cell office:value-type="string" table:style-name="header">
            <text:p>V</text:p>
          </table:table-cell>
          <table:table-cell office:value-type="string" table:style-name="header">
            <text:p>N</text:p>
          </table:table-cell>
          <table:table-cell office:value-type="string" table:style-name="header">
            <text:p>P</text:p>
          </table:table-cell>
          <table:table-cell office:value-type="string" table:style-name="header">
            <text:p>GF</text:p>
          </table:table-cell>
          <table:table-cell office:value-type="string" table:style-name="header">
            <text:p>GS</text:p>
          </table:table-cell>
          <table:table-cell office:value-type="string" table:style-name="header">
            <text:p>Dr</text:p>
          </table:table-cell>
          <table:table-cell office:value-type="string" table:style-name="header">
            <text:p>Pt</text:p>
          </table:table-cell>
        </table:table-row>
        <table:table-row>
          <table:table-cell office:value-type="float" table:style-name="navy" office:value="1">
            <text:p>1</text:p>
          </table:table-cell>
          <table:table-cell office:value-type="string" table:style-name="navy">
            <text:p>Torino 1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2">
            <text:p>2</text:p>
          </table:table-cell>
          <table:table-cell office:value-type="string" table:style-name="navy">
            <text:p>Torino 2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3">
            <text:p>3</text:p>
          </table:table-cell>
          <table:table-cell office:value-type="string" table:style-name="navy">
            <text:p>Mestre 1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4">
            <text:p>4</text:p>
          </table:table-cell>
          <table:table-cell office:value-type="string" table:style-name="navy">
            <text:p>Venezia/Mestre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5">
            <text:p>5</text:p>
          </table:table-cell>
          <table:table-cell office:value-type="string" table:style-name="navy">
            <text:p>Merano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6">
            <text:p>6</text:p>
          </table:table-cell>
          <table:table-cell office:value-type="string" table:style-name="navy">
            <text:p>Pordenone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7">
            <text:p>7</text:p>
          </table:table-cell>
          <table:table-cell office:value-type="string" table:style-name="navy">
            <text:p>San Giorgio di Nogaro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8">
            <text:p>8</text:p>
          </table:table-cell>
          <table:table-cell office:value-type="string" table:style-name="navy">
            <text:p>Udine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9">
            <text:p>9</text:p>
          </table:table-cell>
          <table:table-cell office:value-type="string" table:style-name="navy">
            <text:p>Trieste 1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  <table:table-row>
          <table:table-cell office:value-type="float" table:style-name="navy" office:value="10">
            <text:p>10</text:p>
          </table:table-cell>
          <table:table-cell office:value-type="string" table:style-name="navy">
            <text:p>Trieste 2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  <table:table-cell office:value-type="float" table:style-name="navy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